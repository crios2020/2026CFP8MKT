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d42aa" officeooo:paragraph-rsid="001d42aa"/>
    </style:style>
    <style:style style:name="P4" style:family="paragraph" style:parent-style-name="Title">
      <style:paragraph-properties fo:break-before="page"/>
    </style:style>
    <style:style style:name="P5" style:family="paragraph" style:parent-style-name="Standard">
      <style:text-properties fo:font-weight="normal" officeooo:rsid="001d42aa" officeooo:paragraph-rsid="001d42aa" style:font-weight-asian="normal" style:font-weight-complex="normal"/>
    </style:style>
    <style:style style:name="P6" style:family="paragraph" style:parent-style-name="Text_20_body">
      <style:text-properties officeooo:rsid="001d42aa" officeooo:paragraph-rsid="001d42aa"/>
    </style:style>
    <style:style style:name="P7" style:family="paragraph" style:parent-style-name="Text_20_body">
      <style:text-properties officeooo:rsid="001d42aa"/>
    </style:style>
    <style:style style:name="P8" style:family="paragraph" style:parent-style-name="Text_20_body" style:list-style-name="L1">
      <style:paragraph-properties fo:margin-top="0cm" fo:margin-bottom="0cm" style:contextual-spacing="false"/>
      <style:text-properties officeooo:rsid="001d42aa"/>
    </style:style>
    <style:style style:name="P9" style:family="paragraph" style:parent-style-name="Text_20_body" style:list-style-name="L1">
      <style:text-properties officeooo:rsid="001d42aa"/>
    </style:style>
    <style:style style:name="P10" style:family="paragraph" style:parent-style-name="Text_20_body" style:list-style-name="L2">
      <style:paragraph-properties fo:margin-top="0cm" fo:margin-bottom="0cm" style:contextual-spacing="false"/>
      <style:text-properties officeooo:rsid="001d42aa"/>
    </style:style>
    <style:style style:name="P11" style:family="paragraph" style:parent-style-name="Text_20_body" style:list-style-name="L2">
      <style:text-properties officeooo:rsid="001d42aa"/>
    </style:style>
    <style:style style:name="P12" style:family="paragraph" style:parent-style-name="Text_20_body" style:list-style-name="L3">
      <style:paragraph-properties fo:margin-top="0cm" fo:margin-bottom="0cm" style:contextual-spacing="false"/>
      <style:text-properties officeooo:rsid="001d42aa"/>
    </style:style>
    <style:style style:name="P13" style:family="paragraph" style:parent-style-name="Text_20_body" style:list-style-name="L3">
      <style:text-properties officeooo:rsid="001d42aa"/>
    </style:style>
    <style:style style:name="P14" style:family="paragraph" style:parent-style-name="Text_20_body" style:list-style-name="L4">
      <style:paragraph-properties fo:margin-top="0cm" fo:margin-bottom="0cm" style:contextual-spacing="false"/>
      <style:text-properties officeooo:rsid="001d42aa"/>
    </style:style>
    <style:style style:name="P15" style:family="paragraph" style:parent-style-name="Text_20_body" style:list-style-name="L4">
      <style:text-properties officeooo:rsid="001d42aa"/>
    </style:style>
    <style:style style:name="P16" style:family="paragraph" style:parent-style-name="Text_20_body">
      <style:text-properties officeooo:paragraph-rsid="002099d7"/>
    </style:style>
    <style:style style:name="P17" style:family="paragraph" style:parent-style-name="Text_20_body">
      <style:text-properties officeooo:rsid="001d42aa" officeooo:paragraph-rsid="002099d7"/>
    </style:style>
    <style:style style:name="P18" style:family="paragraph" style:parent-style-name="Text_20_body" style:list-style-name="L5">
      <style:paragraph-properties fo:margin-top="0cm" fo:margin-bottom="0cm" style:contextual-spacing="false"/>
      <style:text-properties officeooo:rsid="001d42aa"/>
    </style:style>
    <style:style style:name="P19" style:family="paragraph" style:parent-style-name="Text_20_body" style:list-style-name="L5">
      <style:text-properties officeooo:rsid="001d42aa"/>
    </style:style>
    <style:style style:name="T1" style:family="text">
      <style:text-properties officeooo:rsid="002099d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1"><text:a xlink:type="simple" xlink:href="#__RefHeading___Toc96_1962956634" office:name="El Agua" text:style-name="Index_20_Link" text:visited-style-name="Index_20_Link">El Agua<text:tab/>2</text:a></text:p>
          <text:p text:style-name="P1"><text:a xlink:type="simple" xlink:href="#__RefHeading___Toc98_1962956634" office:name="El Aire" text:style-name="Index_20_Link" text:visited-style-name="Index_20_Link">El Aire<text:tab/>2</text:a></text:p>
          <text:p text:style-name="P1"><text:a xlink:type="simple" xlink:href="#__RefHeading___Toc100_1962956634" office:name="La Tierra" text:style-name="Index_20_Link" text:visited-style-name="Index_20_Link">La Tierra<text:tab/>3</text:a></text:p>
          <text:p text:style-name="P2"><text:a xlink:type="simple" xlink:href="#__RefHeading___Toc102_1962956634" office:name="En la ciencia moderna (química)" text:style-name="Index_20_Link" text:visited-style-name="Index_20_Link">En la ciencia moderna (química)<text:tab/>3</text:a></text:p>
          <text:p text:style-name="P2"><text:a xlink:type="simple" xlink:href="#__RefHeading___Toc104_1962956634" office:name="En la tradición clásica (filosofía antigua)" text:style-name="Index_20_Link" text:visited-style-name="Index_20_Link">En la tradición clásica (filosofía antigua)<text:tab/>3</text:a></text:p>
        </text:index-body>
      </text:table-of-content>
      <text:p text:style-name="P3"/>
      <text:p text:style-name="P4">Elementos de la naturaleza</text:p>
      <text:p text:style-name="P5"/>
      <text:h text:style-name="Heading_20_1" text:outline-level="1"><text:bookmark-start text:name="__RefHeading___Toc96_1962956634"/>El Agua<text:bookmark-end text:name="__RefHeading___Toc96_1962956634"/></text:h>
      <text:p text:style-name="P6">El agua es una sustancia química formada por dos átomos de hidrógeno y uno de oxígeno, cuya fórmula es H₂O. Es un compuesto esencial para la vida en la Tierra y uno de los más abundantes en el planeta.</text:p>
      <text:p text:style-name="P7">Desde el punto de vista de la química, el agua es un compuesto simple pero con propiedades muy particulares: es polar, puede disolver una gran variedad de sustancias (por eso se la llama “disolvente universal”) y presenta enlaces de hidrógeno que le dan características únicas, como su alto punto de ebullición en comparación con otras moléculas similares.</text:p>
      <text:p text:style-name="P7">En términos biológicos, el agua es fundamental porque:</text:p>
      <text:list text:style-name="L1">
        <text:list-item>
          <text:p text:style-name="P8">Forma parte de todos los seres vivos. </text:p>
        </text:list-item>
        <text:list-item>
          <text:p text:style-name="P8">Permite reacciones químicas esenciales (metabolismo). </text:p>
        </text:list-item>
        <text:list-item>
          <text:p text:style-name="P8">Regula la temperatura. </text:p>
        </text:list-item>
        <text:list-item>
          <text:p text:style-name="P9">Transporta nutrientes y desechos. </text:p>
        </text:list-item>
      </text:list>
      <text:p text:style-name="P7">Además, en la naturaleza se encuentra en tres estados:</text:p>
      <text:list text:style-name="L2">
        <text:list-item>
          <text:p text:style-name="P10">Sólido (hielo) </text:p>
        </text:list-item>
        <text:list-item>
          <text:p text:style-name="P10">Líquido (agua) </text:p>
        </text:list-item>
        <text:list-item>
          <text:p text:style-name="P11">Gaseoso (vapor) </text:p>
        </text:list-item>
      </text:list>
      <text:p text:style-name="P7">También participa en procesos clave como el ciclo del agua, donde circula entre la atmósfera, la superficie terrestre y los océanos.</text:p>
      <text:p text:style-name="P3"/>
      <text:h text:style-name="Heading_20_1" text:outline-level="1"><text:bookmark-start text:name="__RefHeading___Toc98_1962956634"/>El Aire<text:bookmark-end text:name="__RefHeading___Toc98_1962956634"/></text:h>
      <text:p text:style-name="P6">El aire es una mezcla homogénea de gases que constituye la atmósfera terrestre. No es un compuesto único, sino una solución gaseosa formada principalmente por:</text:p>
      <text:list text:style-name="L3">
        <text:list-item>
          <text:p text:style-name="P12">Nitrógeno (N₂) ≈ 78 % </text:p>
        </text:list-item>
        <text:list-item>
          <text:p text:style-name="P12">Oxígeno (O₂) ≈ 21 % </text:p>
        </text:list-item>
        <text:list-item>
          <text:p text:style-name="P12">Argón (Ar) ≈ 0,93 % </text:p>
        </text:list-item>
        <text:list-item>
          <text:p text:style-name="P12">Dióxido de carbono (CO₂) ≈ 0,04 % </text:p>
        </text:list-item>
        <text:list-item>
          <text:p text:style-name="P13">Trazas de otros gases (neón, helio, metano, ozono, etc.) </text:p>
        </text:list-item>
      </text:list>
      <text:p text:style-name="P7">Desde la fisicoquímica, el aire puede describirse como una mezcla ideal en muchas condiciones, donde sus componentes se comportan de manera independiente según la ley de Dalton de las presiones parciales. Cada gas contribuye a la presión total en función de su fracción molar.</text:p>
      <text:p text:style-name="P7">Además, el aire contiene una cantidad variable de vapor de agua, lo que introduce el concepto de humedad (relativa o absoluta), fundamental en fenómenos atmosféricos.</text:p>
      <text:p text:style-name="P7">Desde el punto de vista físico:</text:p>
      <text:list text:style-name="L4">
        <text:list-item>
          <text:p text:style-name="P14"><text:soft-page-break/>Es un fluido compresible. </text:p>
        </text:list-item>
        <text:list-item>
          <text:p text:style-name="P14">Tiene densidad variable según temperatura y presi<text:span text:style-name="T1">ó</text:span>n. </text:p>
        </text:list-item>
        <text:list-item>
          <text:p text:style-name="P15">Puede transmitir ondas (como el sonido). </text:p>
        </text:list-item>
      </text:list>
      <text:p text:style-name="P7">En términos químicos, el aire es reactivo debido a la presencia de <text:span text:style-name="T1">o</text:span>xígeno, lo que permite procesos como la combustión y la respiración.</text:p>
      <text:p text:style-name="P7">También es el medio donde ocurren procesos clave de la meteorología, como la formación de nubes, vientos y precipitaciones.</text:p>
      <text:p text:style-name="P3"/>
      <text:p text:style-name="P3"/>
      <text:h text:style-name="Heading_20_1" text:outline-level="1"><text:bookmark-start text:name="__RefHeading___Toc100_1962956634"/>La Tierra<text:bookmark-end text:name="__RefHeading___Toc100_1962956634"/></text:h>
      <text:h text:style-name="Heading_20_2" text:outline-level="2"><text:bookmark-start text:name="__RefHeading___Toc102_1962956634"/><text:span text:style-name="Strong_20_Emphasis">En la ciencia moderna (química)</text:span><text:bookmark-end text:name="__RefHeading___Toc102_1962956634"/></text:h>
      <text:p text:style-name="P16">La tierr<text:span text:style-name="Emphasis">a no es un elemento quími</text:span>co. Es una mezcla heterogénea de minerales, materia orgánica, agua y aire. Está compuesta por numerosos elementos de la química como silicio, oxígeno, aluminio, hierro, calcio, entre otros, organizados en minerales (arcillas, arenas, limos, etc.). Desde este enfoque, hablar de “tierra como elemento” no es correcto técnicamente.</text:p>
      <text:p text:style-name="P16"/>
      <text:h text:style-name="Heading_20_2" text:outline-level="2"><text:bookmark-start text:name="__RefHeading___Toc104_1962956634"/><text:span text:style-name="Strong_20_Emphasis">En la tradición clásica (filosofía antigua)</text:span><text:bookmark-end text:name="__RefHeading___Toc104_1962956634"/></text:h>
      <text:p text:style-name="P17"><text:line-break/>La “tierra” sí era considerada uno de los cuatro elementos fundamentales junto con el agua, el aire y el fuego, especialmente en la teoría de Aristóteles. En ese marco, la tierra representaba:</text:p>
      <text:list text:style-name="L5">
        <text:list-item>
          <text:p text:style-name="P18">Lo sólido y estable </text:p>
        </text:list-item>
        <text:list-item>
          <text:p text:style-name="P18">La pesadez </text:p>
        </text:list-item>
        <text:list-item>
          <text:p text:style-name="P19">La sequedad y frialdad </text:p>
        </text:list-item>
      </text:list>
      <text:p text:style-name="P7">Este concepto pertenece más a la filosofía natural que a la ciencia actual.</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15:05:09.539405716</meta:creation-date>
    <dc:date>2026-04-27T15:27:30.991707037</dc:date>
    <meta:editing-duration>PT11M42S</meta:editing-duration>
    <meta:editing-cycles>2</meta:editing-cycles>
    <meta:generator>LibreOffice/26.2.2.2$Linux_X86_64 LibreOffice_project/1f77d10d6938fd34972958f64b2bcfa54f8b1ba5</meta:generator>
    <meta:document-statistic meta:table-count="0" meta:image-count="0" meta:object-count="0" meta:page-count="3" meta:paragraph-count="44" meta:word-count="527" meta:character-count="3094" meta:non-whitespace-character-count="2618"/>
  </office:meta>
</office:document-meta>
</file>