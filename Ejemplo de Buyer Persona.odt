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T1" style:family="text">
      <style:text-properties officeooo:rsid="001cee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👤 Buyer Persona (perfil estimado)</text:h>
      <text:h text:style-name="Heading_20_3" text:outline-level="3">📌 Datos demográficos (estimados)</text:h>
      <text:list text:style-name="L1">
        <text:list-item>
          <text:p text:style-name="P1"><text:span text:style-name="Strong_20_Emphasis">Edad:</text:span> 40–55 años </text:p>
        </text:list-item>
        <text:list-item>
          <text:p text:style-name="P1"><text:span text:style-name="Strong_20_Emphasis">Género:</text:span> masculino </text:p>
        </text:list-item>
        <text:list-item>
          <text:p text:style-name="P1"><text:span text:style-name="Strong_20_Emphasis">Ubicación probable:</text:span> entorno urbano (se observan transporte público y espacios de ciudad, posiblemente AMBA) </text:p>
        </text:list-item>
        <text:list-item>
          <text:p text:style-name="P1"><text:span text:style-name="Strong_20_Emphasis">Nivel socioeconómico:</text:span> medio / medio-alto </text:p>
        </text:list-item>
        <text:list-item>
          <text:p text:style-name="P2"><text:span text:style-name="Strong_20_Emphasis">Educación:</text:span> probablemente terciaria o universitaria (por contexto laboral/oficina) </text:p>
        </text:list-item>
      </text:list>
      <text:p text:style-name="Horizontal_20_Line"/>
      <text:h text:style-name="Heading_20_3" text:outline-level="3">💼 Perfil profesional</text:h>
      <text:list text:style-name="L2">
        <text:list-item>
          <text:p text:style-name="P3">Parece una persona <text:span text:style-name="Strong_20_Emphasis">activa laboralmente</text:span>, posiblemente: </text:p>
          <text:list>
            <text:list-item>
              <text:p text:style-name="P3">administrativo / profesional técnico </text:p>
            </text:list-item>
            <text:list-item>
              <text:p text:style-name="P3">docente / capacitador </text:p>
            </text:list-item>
            <text:list-item>
              <text:p text:style-name="P3">o trabajador de oficina / tecnología </text:p>
            </text:list-item>
          </text:list>
        </text:list-item>
        <text:list-item>
          <text:p text:style-name="P4">Usa computadora de escritorio → indicio de trabajo estructurado o remoto parcial. </text:p>
        </text:list-item>
      </text:list>
      <text:p text:style-name="Horizontal_20_Line"/>
      <text:h text:style-name="Heading_20_3" text:outline-level="3">🚇 Estilo de vida</text:h>
      <text:list text:style-name="L3">
        <text:list-item>
          <text:p text:style-name="P5">Usa <text:span text:style-name="Strong_20_Emphasis">transporte público (tren/subte)</text:span> → rutina diaria urbana </text:p>
        </text:list-item>
        <text:list-item>
          <text:p text:style-name="P5">Se mueve entre: </text:p>
          <text:list>
            <text:list-item>
              <text:p text:style-name="P5">oficina </text:p>
            </text:list-item>
            <text:list-item>
              <text:p text:style-name="P5">espacios públicos </text:p>
            </text:list-item>
            <text:list-item>
              <text:p text:style-name="P5">cafeterías o lugares de reunión </text:p>
            </text:list-item>
          </text:list>
        </text:list-item>
        <text:list-item>
          <text:p text:style-name="P6">Lleva mochila → perfil práctico, trabajador activo </text:p>
        </text:list-item>
      </text:list>
      <text:p text:style-name="Horizontal_20_Line"/>
      <text:h text:style-name="Heading_20_3" text:outline-level="3">👕 Comportamiento y personalidad (desde lo observable)</text:h>
      <text:list text:style-name="L4">
        <text:list-item>
          <text:p text:style-name="P7"><text:span text:style-name="Strong_20_Emphasis">Estilo casual–prolijo</text:span> (camisas, chombas, lentes modernos) </text:p>
        </text:list-item>
        <text:list-item>
          <text:p text:style-name="P7">Se muestra: </text:p>
          <text:list>
            <text:list-item>
              <text:p text:style-name="P7">accesible </text:p>
            </text:list-item>
            <text:list-item>
              <text:p text:style-name="P7">relajado </text:p>
            </text:list-item>
            <text:list-item>
              <text:p text:style-name="P7">sociable (sonrisa en varias fotos) </text:p>
            </text:list-item>
          </text:list>
        </text:list-item>
        <text:list-item>
          <text:p text:style-name="P7">Probable perfil: </text:p>
          <text:list>
            <text:list-item>
              <text:p text:style-name="P7">pragmático </text:p>
            </text:list-item>
            <text:list-item>
              <text:p text:style-name="P7">orientado a soluciones </text:p>
            </text:list-item>
            <text:list-item>
              <text:p text:style-name="P8">no extremadamente fashion, pero cuida su imagen </text:p>
            </text:list-item>
          </text:list>
        </text:list-item>
      </text:list>
      <text:p text:style-name="Horizontal_20_Line"/>
      <text:h text:style-name="Heading_20_3" text:outline-level="3">🧠 Intereses y motivaciones (inferidos)</text:h>
      <text:list text:style-name="L5">
        <text:list-item>
          <text:p text:style-name="P9">Tecnología funcional (no necesariamente “geek”, pero sí usuario frecuente) </text:p>
        </text:list-item>
        <text:list-item>
          <text:p text:style-name="P9"><text:soft-page-break/>Productividad y practicidad </text:p>
        </text:list-item>
        <text:list-item>
          <text:p text:style-name="P9">Bienestar cotidiano (comodidad, eficiencia en traslados) </text:p>
        </text:list-item>
        <text:list-item>
          <text:p text:style-name="P9">Posible interés en: </text:p>
          <text:list>
            <text:list-item>
              <text:p text:style-name="P9">capacitación </text:p>
            </text:list-item>
            <text:list-item>
              <text:p text:style-name="P9">herramientas digitales </text:p>
            </text:list-item>
            <text:list-item>
              <text:p text:style-name="P10">consumo racional (calidad/precio) </text:p>
            </text:list-item>
          </text:list>
        </text:list-item>
      </text:list>
      <text:p text:style-name="Horizontal_20_Line"/>
      <text:h text:style-name="Heading_20_3" text:outline-level="3">💸 Comportamiento de compra</text:h>
      <text:list text:style-name="L6">
        <text:list-item>
          <text:p text:style-name="P11"><text:span text:style-name="Strong_20_Emphasis">Racional y comparativo</text:span> </text:p>
        </text:list-item>
        <text:list-item>
          <text:p text:style-name="P11">Valora: </text:p>
          <text:list>
            <text:list-item>
              <text:p text:style-name="P11">utilidad </text:p>
            </text:list-item>
            <text:list-item>
              <text:p text:style-name="P11">durabilidad </text:p>
            </text:list-item>
            <text:list-item>
              <text:p text:style-name="P11">precio justo </text:p>
            </text:list-item>
          </text:list>
        </text:list-item>
        <text:list-item>
          <text:p text:style-name="P11">Probablemente: </text:p>
          <text:list>
            <text:list-item>
              <text:p text:style-name="P11">investiga antes de comprar </text:p>
            </text:list-item>
            <text:list-item>
              <text:p text:style-name="P11">no compra impulsivamente </text:p>
            </text:list-item>
          </text:list>
        </text:list-item>
        <text:list-item>
          <text:p text:style-name="P11">Sensible a: </text:p>
          <text:list>
            <text:list-item>
              <text:p text:style-name="P11">promociones claras </text:p>
            </text:list-item>
            <text:list-item>
              <text:p text:style-name="P12">beneficios concretos (ahorro de tiempo/dinero) </text:p>
            </text:list-item>
          </text:list>
        </text:list-item>
      </text:list>
      <text:p text:style-name="Horizontal_20_Line"/>
      <text:h text:style-name="Heading_20_3" text:outline-level="3">📱 Canales digitales</text:h>
      <text:list text:style-name="L7">
        <text:list-item>
          <text:p text:style-name="P13">Probable uso de: </text:p>
          <text:list>
            <text:list-item>
              <text:p text:style-name="P13">Facebook (grupos, noticias) </text:p>
            </text:list-item>
            <text:list-item>
              <text:p text:style-name="P13">WhatsApp (comunicación diaria) </text:p>
            </text:list-item>
            <text:list-item>
              <text:p text:style-name="P13">YouTube (tutoriales) </text:p>
            </text:list-item>
            <text:list-item>
              <text:p text:style-name="P13">Google (búsquedas prácticas) </text:p>
            </text:list-item>
          </text:list>
        </text:list-item>
        <text:list-item>
          <text:p text:style-name="P13">Menor probabilidad: </text:p>
          <text:list>
            <text:list-item>
              <text:p text:style-name="P13">TikTok intensivo </text:p>
            </text:list-item>
            <text:list-item>
              <text:p text:style-name="P14">consumo muy trendy </text:p>
            </text:list-item>
          </text:list>
        </text:list-item>
      </text:list>
      <text:p text:style-name="Horizontal_20_Line"/>
      <text:h text:style-name="Heading_20_3" text:outline-level="3">🎯 Necesidades</text:h>
      <text:list text:style-name="L8">
        <text:list-item>
          <text:p text:style-name="P15">Optimizar tiempo (traslados, trabajo) </text:p>
        </text:list-item>
        <text:list-item>
          <text:p text:style-name="P15">Soluciones simples y claras </text:p>
        </text:list-item>
        <text:list-item>
          <text:p text:style-name="P15">Productos confiables </text:p>
        </text:list-item>
        <text:list-item>
          <text:p text:style-name="P16">Buen soporte/postventa </text:p>
        </text:list-item>
      </text:list>
      <text:p text:style-name="Horizontal_20_Line"/>
      <text:h text:style-name="Heading_20_3" text:outline-level="3">⚠️ Frustraciones</text:h>
      <text:list text:style-name="L9">
        <text:list-item>
          <text:p text:style-name="P17">Publicidad engañosa </text:p>
        </text:list-item>
        <text:list-item>
          <text:p text:style-name="P17">Productos de baja calidad </text:p>
        </text:list-item>
        <text:list-item>
          <text:p text:style-name="P17"><text:soft-page-break/>Procesos complicados (apps difíciles, compras confusas) </text:p>
        </text:list-item>
        <text:list-item>
          <text:p text:style-name="P18">Pérdida de tiempo </text:p>
        </text:list-item>
      </text:list>
      <text:p text:style-name="Horizontal_20_Line"/>
      <text:h text:style-name="Heading_20_2" text:outline-level="2">🧩 Ejemplo de Buyer Persona (formato listo para entregar)</text:h>
      <text:p text:style-name="Text_20_body"><text:span text:style-name="Strong_20_Emphasis">Nombre:</text:span> Carlos<text:line-break/><text:span text:style-name="Strong_20_Emphasis">Edad:</text:span> 48 años<text:line-break/><text:span text:style-name="Strong_20_Emphasis">Ocupación:</text:span> empleado administrativo / docente técnico<text:line-break/><text:span text:style-name="Strong_20_Emphasis">Objetivo:</text:span> mejorar su productividad diaria y optimizar su tiempo<text:line-break/><text:span text:style-name="Strong_20_Emphasis">Frustración principal:</text:span> perder tiempo con herramientas poco prácticas<text:line-break/><text:span text:style-name="Strong_20_Emphasis">Canales:</text:span> Facebook, WhatsApp, Google<text:line-break/><text:span text:style-name="Strong_20_Emphasis">Motivación de compra:</text:span> relación calidad-precio y funcionalidad</text:p>
      <text:p text:style-name="Standard"/>
      <text:h text:style-name="Heading_20_2" text:outline-level="2">🍽️ <text:span text:style-name="T1">Alimentación </text:span>Inferencias razonables (como hipótesis)</text:h>
      <text:p text:style-name="Text_20_body">Basado en su estilo de vida urbano y práctico:</text:p>
      <text:h text:style-name="Heading_20_3" text:outline-level="3">🧩 Posibles hábitos</text:h>
      <text:list text:style-name="L10">
        <text:list-item>
          <text:p text:style-name="P19">Come fuera de casa ocasionalmente (por trabajo o traslados) </text:p>
        </text:list-item>
        <text:list-item>
          <text:p text:style-name="P19">Probable consumo de: </text:p>
          <text:list>
            <text:list-item>
              <text:p text:style-name="P19">menús ejecutivos </text:p>
            </text:list-item>
            <text:list-item>
              <text:p text:style-name="P19">comida rápida “resuelta” (pero no necesariamente fast food extremo) </text:p>
            </text:list-item>
          </text:list>
        </text:list-item>
        <text:list-item>
          <text:p text:style-name="P19">Puede valorar: </text:p>
          <text:list>
            <text:list-item>
              <text:p text:style-name="P19">comida casera </text:p>
            </text:list-item>
            <text:list-item>
              <text:p text:style-name="P20">opciones simples y abundantes </text:p>
            </text:list-item>
          </text:list>
        </text:list-item>
      </text:list>
      <text:p text:style-name="Horizontal_20_Line"/>
      <text:h text:style-name="Heading_20_3" text:outline-level="3">💡 Preferencias probables</text:h>
      <text:list text:style-name="L11">
        <text:list-item>
          <text:p text:style-name="P21">🍝 Comida tradicional (tipo casera) </text:p>
        </text:list-item>
        <text:list-item>
          <text:p text:style-name="P21">🥩 Platos conocidos (carne, pastas, milanesas, etc.) </text:p>
        </text:list-item>
        <text:list-item>
          <text:p text:style-name="P21">☕ Cafeterías o bares urbanos </text:p>
        </text:list-item>
        <text:list-item>
          <text:p text:style-name="P22">🍽️ Lugares prácticos más que “gourmet” </text:p>
        </text:list-item>
      </text:list>
      <text:p text:style-name="Horizontal_20_Line"/>
      <text:h text:style-name="Heading_20_3" text:outline-level="3">⚠️ Lo que NO podés afirmar</text:h>
      <text:p text:style-name="Text_20_body">Evitar poner en el TP cosas como:</text:p>
      <text:list text:style-name="L12">
        <text:list-item>
          <text:p text:style-name="P23">“es vegano” </text:p>
        </text:list-item>
        <text:list-item>
          <text:p text:style-name="P23">“come saludable” </text:p>
        </text:list-item>
        <text:list-item>
          <text:p text:style-name="P24">“le gusta X dieta específica” </text:p>
        </text:list-item>
      </text:list>
      <text:p text:style-name="Text_20_body">Eso sería inventar sin evidencia.</text:p>
      <text:p text:style-name="Horizontal_20_Line"/>
      <text:h text:style-name="Heading_20_2" text:outline-level="2"><text:soft-page-break/>🎯 Cómo escribirlo correctamente en el TP</text:h>
      <text:p text:style-name="Text_20_body">Podés poner algo así:</text:p>
      <text:p text:style-name="Quotations">“En base a su estilo de vida urbano y laboral activo, se infiere que el Buyer Persona podría priorizar opciones alimenticias prácticas, accesibles y de rápida resolución, como menús ejecutivos o comida tradicional. Estas conclusiones se presentan como hipótesis y deberían validarse con investigación adicional.”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5:13:31.471753949</meta:creation-date>
    <dc:date>2026-04-15T15:23:54.589932933</dc:date>
    <meta:editing-duration>PT10M23S</meta:editing-duration>
    <meta:editing-cycles>2</meta:editing-cycles>
    <meta:generator>LibreOffice/26.2.2.2$Linux_X86_64 LibreOffice_project/1f77d10d6938fd34972958f64b2bcfa54f8b1ba5</meta:generator>
    <meta:document-statistic meta:table-count="0" meta:image-count="0" meta:object-count="0" meta:page-count="4" meta:paragraph-count="95" meta:word-count="537" meta:character-count="3527" meta:non-whitespace-character-count="3087"/>
  </office:meta>
</office:document-meta>
</file>