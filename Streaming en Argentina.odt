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706cm" table:align="left"/>
    </style:style>
    <style:style style:name="Tabla1.A" style:family="table-column">
      <style:table-column-properties style:column-width="1.718cm"/>
    </style:style>
    <style:style style:name="Tabla1.B" style:family="table-column">
      <style:table-column-properties style:column-width="2.98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1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>
      <style:paragraph-properties fo:margin-top="0cm" fo:margin-bottom="0cm" style:contextual-spacing="false"/>
    </style:style>
    <style:style style:name="P30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ctualmente las señales de streaming más vistas en Argentina son principalmente canales transmitidos por:</text:p>
      <text:list text:style-name="L1">
        <text:list-item>
          <text:p text:style-name="P1">YouTube </text:p>
        </text:list-item>
        <text:list-item>
          <text:p text:style-name="P1">Twitch </text:p>
        </text:list-item>
        <text:list-item>
          <text:p text:style-name="P2">Kick </text:p>
        </text:list-item>
      </text:list>
      <text:p text:style-name="Text_20_body">y que funcionan como una mezcla entre:</text:p>
      <text:list text:style-name="L2">
        <text:list-item>
          <text:p text:style-name="P3">TV online </text:p>
        </text:list-item>
        <text:list-item>
          <text:p text:style-name="P3">radio visual </text:p>
        </text:list-item>
        <text:list-item>
          <text:p text:style-name="P3">podcasts en vivo </text:p>
        </text:list-item>
        <text:list-item>
          <text:p text:style-name="P4">entretenimiento digital. </text:p>
        </text:list-item>
      </text:list>
      <text:h text:style-name="Heading_20_1" text:outline-level="1">Ranking general de señales más vistas (2025–2026)</text:h>
      <text:h text:style-name="Heading_20_2" text:outline-level="2">1. <text:a xlink:type="simple" xlink:href="https://luzutv.com.ar/?utm_source=chatgpt.com" office:target-frame-name="_blank" xlink:show="new" text:style-name="Internet_20_link" text:visited-style-name="Visited_20_Internet_20_Link">Luzu TV</text:a></text:h>
      <text:p text:style-name="Text_20_body">Fundada por:</text:p>
      <text:list text:style-name="L3">
        <text:list-item>
          <text:p text:style-name="P5">Nicolás Occhiato </text:p>
        </text:list-item>
      </text:list>
      <text:p text:style-name="Text_20_body">Es actualmente una de las dos señales líderes absolutas del país.<text:line-break/>Programas como:</text:p>
      <text:list text:style-name="L4">
        <text:list-item>
          <text:p text:style-name="P6"><text:span text:style-name="Emphasis">Nadie Dice Nada</text:span> </text:p>
        </text:list-item>
        <text:list-item>
          <text:p text:style-name="P7"><text:span text:style-name="Emphasis">Antes que Nadie</text:span> </text:p>
        </text:list-item>
      </text:list>
      <text:p text:style-name="Text_20_body">dominan las métricas de views y clips virales. </text:p>
      <text:p text:style-name="Horizontal_20_Line"/>
      <text:h text:style-name="Heading_20_2" text:outline-level="2">2. OLGA</text:h>
      <text:p text:style-name="Text_20_body">Creada alrededor de:</text:p>
      <text:list text:style-name="L5">
        <text:list-item>
          <text:p text:style-name="P8">Migue Granados </text:p>
        </text:list-item>
      </text:list>
      <text:p text:style-name="Text_20_body">Compite cabeza a cabeza con Luzu y tuvo enorme crecimiento en 2025.<text:line-break/>Programas destacados:</text:p>
      <text:list text:style-name="L6">
        <text:list-item>
          <text:p text:style-name="P9"><text:span text:style-name="Emphasis">Soñé que volaba</text:span> </text:p>
        </text:list-item>
        <text:list-item>
          <text:p text:style-name="P10"><text:span text:style-name="Emphasis">Sería increíble</text:span> </text:p>
        </text:list-item>
      </text:list>
      <text:p text:style-name="Horizontal_20_Line"/>
      <text:h text:style-name="Heading_20_2" text:outline-level="2">3. Blender</text:h>
      <text:p text:style-name="Text_20_body">Canal muy fuerte en:</text:p>
      <text:list text:style-name="L7">
        <text:list-item>
          <text:p text:style-name="P11">actualidad </text:p>
        </text:list-item>
        <text:list-item>
          <text:p text:style-name="P11"><text:soft-page-break/>política </text:p>
        </text:list-item>
        <text:list-item>
          <text:p text:style-name="P11">humor </text:p>
        </text:list-item>
        <text:list-item>
          <text:p text:style-name="P12">análisis social </text:p>
        </text:list-item>
      </text:list>
      <text:p text:style-name="Text_20_body">Muy popular entre público joven urbano. </text:p>
      <text:p text:style-name="Horizontal_20_Line"/>
      <text:h text:style-name="Heading_20_2" text:outline-level="2">4. Vorterix</text:h>
      <text:p text:style-name="Text_20_body">Fundado por:</text:p>
      <text:list text:style-name="L8">
        <text:list-item>
          <text:p text:style-name="P13">Mario Pergolini </text:p>
        </text:list-item>
      </text:list>
      <text:p text:style-name="Text_20_body">Fue pionero del modelo “radio + streaming” en Argentina.<text:line-break/>Programas muy vistos:</text:p>
      <text:list text:style-name="L9">
        <text:list-item>
          <text:p text:style-name="P14"><text:span text:style-name="Emphasis">Paren la Mano</text:span> </text:p>
        </text:list-item>
      </text:list>
      <text:p text:style-name="Horizontal_20_Line"/>
      <text:h text:style-name="Heading_20_2" text:outline-level="2">5. AZZ Stream</text:h>
      <text:p text:style-name="Text_20_body">Muy fuerte en:</text:p>
      <text:list text:style-name="L10">
        <text:list-item>
          <text:p text:style-name="P15">deportes </text:p>
        </text:list-item>
        <text:list-item>
          <text:p text:style-name="P15">fútbol </text:p>
        </text:list-item>
        <text:list-item>
          <text:p text:style-name="P16">actualidad deportiva </text:p>
        </text:list-item>
      </text:list>
      <text:p text:style-name="Text_20_body">Creció muchísimo en audiencia digital. </text:p>
      <text:p text:style-name="Horizontal_20_Line"/>
      <text:h text:style-name="Heading_20_1" text:outline-level="1">Otros canales importantes</text:h>
      <text:h text:style-name="Heading_20_2" text:outline-level="2"><text:a xlink:type="simple" xlink:href="https://gelatina.com.ar/?utm_source=chatgpt.com" office:target-frame-name="_blank" xlink:show="new" text:style-name="Internet_20_link" text:visited-style-name="Visited_20_Internet_20_Link">Gelatina</text:a></text:h>
      <text:p text:style-name="Text_20_body">Orientación:</text:p>
      <text:list text:style-name="L11">
        <text:list-item>
          <text:p text:style-name="P17">política </text:p>
        </text:list-item>
        <text:list-item>
          <text:p text:style-name="P17">cultura </text:p>
        </text:list-item>
        <text:list-item>
          <text:p text:style-name="P18">análisis social </text:p>
        </text:list-item>
      </text:list>
      <text:p text:style-name="Horizontal_20_Line"/>
      <text:h text:style-name="Heading_20_2" text:outline-level="2">Bondi Live</text:h>
      <text:p text:style-name="Text_20_body">Muy enfocado en:</text:p>
      <text:list text:style-name="L12">
        <text:list-item>
          <text:p text:style-name="P19">espectáculos </text:p>
        </text:list-item>
        <text:list-item>
          <text:p text:style-name="P19">farándula </text:p>
        </text:list-item>
        <text:list-item>
          <text:p text:style-name="P20">entretenimiento </text:p>
        </text:list-item>
      </text:list>
      <text:p text:style-name="Horizontal_20_Line"/>
      <text:h text:style-name="Heading_20_2" text:outline-level="2"><text:soft-page-break/>Carajo</text:h>
      <text:p text:style-name="Text_20_body">Canal con fuerte presencia:</text:p>
      <text:list text:style-name="L13">
        <text:list-item>
          <text:p text:style-name="P21">política </text:p>
        </text:list-item>
        <text:list-item>
          <text:p text:style-name="P21">humor </text:p>
        </text:list-item>
        <text:list-item>
          <text:p text:style-name="P21">debate </text:p>
        </text:list-item>
        <text:list-item>
          <text:p text:style-name="P22">comunidad online joven </text:p>
        </text:list-item>
      </text:list>
      <text:p text:style-name="Text_20_body">Muy viral en redes.</text:p>
      <text:p text:style-name="Horizontal_20_Line"/>
      <text:h text:style-name="Heading_20_2" text:outline-level="2">La Casa Stream</text:h>
      <text:p text:style-name="Text_20_body">Uno de los canales emergentes con mayor crecimiento en 2025. </text:p>
      <text:p text:style-name="Horizontal_20_Line"/>
      <text:h text:style-name="Heading_20_1" text:outline-level="1">Top aproximado por visualizaciones anual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Posición</text:p>
            </table:table-cell>
            <table:table-cell table:style-name="Tabla1.A1" office:value-type="string">
              <text:p text:style-name="Table_20_Heading">Canal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Luzu TV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OLGA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Blender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Vorterix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AZZ Stream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Carnaval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Infobae en Vivo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Gelatina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La Casa Stream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Bondi Live</text:p>
          </table:table-cell>
        </table:table-row>
      </table:table>
      <text:p text:style-name="Horizontal_20_Line"/>
      <text:h text:style-name="Heading_20_1" text:outline-level="1">Tendencias actuales del streaming argentino</text:h>
      <text:h text:style-name="Heading_20_2" text:outline-level="2">Lo que domina hoy</text:h>
      <text:list text:style-name="L14">
        <text:list-item>
          <text:p text:style-name="P23">programas tipo “mesa” </text:p>
        </text:list-item>
        <text:list-item>
          <text:p text:style-name="P23">humor y charla informal </text:p>
        </text:list-item>
        <text:list-item>
          <text:p text:style-name="P23">actualidad política </text:p>
        </text:list-item>
        <text:list-item>
          <text:p text:style-name="P23">clips virales para TikTok/Instagram </text:p>
        </text:list-item>
        <text:list-item>
          <text:p text:style-name="P24">interacción en vivo con chat </text:p>
        </text:list-item>
      </text:list>
      <text:h text:style-name="Heading_20_2" text:outline-level="2">Público principal</text:h>
      <text:p text:style-name="Text_20_body">Principalmente:</text:p>
      <text:list text:style-name="L15">
        <text:list-item>
          <text:p text:style-name="P25"><text:soft-page-break/>16 a 40 años </text:p>
        </text:list-item>
        <text:list-item>
          <text:p text:style-name="P25">AMBA y grandes ciudades </text:p>
        </text:list-item>
        <text:list-item>
          <text:p text:style-name="P26">audiencia que consume menos TV tradicional </text:p>
        </text:list-item>
      </text:list>
      <text:h text:style-name="Heading_20_2" text:outline-level="2">Plataformas dominantes</text:h>
      <text:list text:style-name="L16">
        <text:list-item>
          <text:p text:style-name="P27">YouTube (principal) </text:p>
        </text:list-item>
        <text:list-item>
          <text:p text:style-name="P27">Twitch </text:p>
        </text:list-item>
        <text:list-item>
          <text:p text:style-name="P27">TikTok clips </text:p>
        </text:list-item>
        <text:list-item>
          <text:p text:style-name="P28">Kick (en crecimiento) </text:p>
        </text:list-item>
      </text:list>
      <text:p text:style-name="Horizontal_20_Line"/>
      <text:h text:style-name="Heading_20_1" text:outline-level="1">Dato importante</text:h>
      <text:p text:style-name="Text_20_body">En Argentina el fenómeno del “canal de streaming” explotó muchísimo más que en otros países hispanohablantes.<text:line-break/>Hoy compiten directamente contra:</text:p>
      <text:list text:style-name="L17">
        <text:list-item>
          <text:p text:style-name="P29">canales de TV </text:p>
        </text:list-item>
        <text:list-item>
          <text:p text:style-name="P29">radios tradicionales </text:p>
        </text:list-item>
        <text:list-item>
          <text:p text:style-name="P30">medios periodísticos clásico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7T16:13:53.422962619</meta:creation-date>
    <dc:date>2026-05-27T16:14:06.251738021</dc:date>
    <meta:editing-duration>PT13S</meta:editing-duration>
    <meta:editing-cycles>1</meta:editing-cycles>
    <meta:document-statistic meta:table-count="1" meta:image-count="0" meta:object-count="0" meta:page-count="4" meta:paragraph-count="106" meta:word-count="364" meta:character-count="2114" meta:non-whitespace-character-count="1854"/>
    <meta:generator>LibreOffice/26.2.2.2$Linux_X86_64 LibreOffice_project/1f77d10d6938fd34972958f64b2bcfa54f8b1ba5</meta:generator>
  </office:meta>
</office:document-meta>
</file>