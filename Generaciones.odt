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as generaciones sirven como referencia útil, pero no son una regla rígida. Tomalas como “tendencias probables”, no como certezas absolutas. Dicho eso, te dejo un mapa claro y práctico para contexto comercial:</text:p>
      <text:p text:style-name="Horizontal_20_Line"/>
      <text:h text:style-name="Heading_20_2" text:outline-level="2">📊 Rangos de edad aproximados (a 2026)</text:h>
      <text:list text:style-name="L1">
        <text:list-item>
          <text:p text:style-name="P1"><text:span text:style-name="Strong_20_Emphasis">Baby Boomers</text:span>: nacidos entre <text:span text:style-name="Strong_20_Emphasis">1946–1964</text:span><text:line-break/>👉 Hoy: <text:span text:style-name="Strong_20_Emphasis">62 a 80 años</text:span> </text:p>
        </text:list-item>
        <text:list-item>
          <text:p text:style-name="P1"><text:span text:style-name="Strong_20_Emphasis">Generación X</text:span>: nacidos entre <text:span text:style-name="Strong_20_Emphasis">1965–1980</text:span><text:line-break/>👉 Hoy: <text:span text:style-name="Strong_20_Emphasis">46 a 61 años</text:span> </text:p>
        </text:list-item>
        <text:list-item>
          <text:p text:style-name="P1"><text:span text:style-name="Strong_20_Emphasis">Generación Y (Millennials)</text:span>: nacidos entre <text:span text:style-name="Strong_20_Emphasis">1981–1996</text:span><text:line-break/>👉 Hoy: <text:span text:style-name="Strong_20_Emphasis">30 a 45 años</text:span> </text:p>
        </text:list-item>
        <text:list-item>
          <text:p text:style-name="P2"><text:span text:style-name="Strong_20_Emphasis">Generación Z (Centennials)</text:span>: nacidos entre <text:span text:style-name="Strong_20_Emphasis">1997–2012</text:span><text:line-break/>👉 Hoy: <text:span text:style-name="Strong_20_Emphasis">14 a 29 años</text:span> </text:p>
        </text:list-item>
      </text:list>
      <text:p text:style-name="Horizontal_20_Line"/>
      <text:h text:style-name="Heading_20_2" text:outline-level="2">🧠 Preferencias y comportamientos por generación</text:h>
      <text:h text:style-name="Heading_20_3" text:outline-level="3">👴 Baby Boomers</text:h>
      <text:p text:style-name="Text_20_body"><text:span text:style-name="Strong_20_Emphasis">Cómo son en general:</text:span></text:p>
      <text:list text:style-name="L2">
        <text:list-item>
          <text:p text:style-name="P3">Valoran la <text:span text:style-name="Strong_20_Emphasis">confianza personal</text:span> y la trayectoria </text:p>
        </text:list-item>
        <text:list-item>
          <text:p text:style-name="P3">Prefieren el <text:span text:style-name="Strong_20_Emphasis">trato directo</text:span> (cara a cara o teléfono) </text:p>
        </text:list-item>
        <text:list-item>
          <text:p text:style-name="P4">Son más <text:span text:style-name="Strong_20_Emphasis">leales</text:span> si la relación funciona </text:p>
        </text:list-item>
      </text:list>
      <text:p text:style-name="Text_20_body"><text:span text:style-name="Strong_20_Emphasis">En lo comercial:</text:span></text:p>
      <text:list text:style-name="L3">
        <text:list-item>
          <text:p text:style-name="P5">Les importa mucho <text:span text:style-name="Strong_20_Emphasis">quién sos</text:span>, no solo qué vendés </text:p>
        </text:list-item>
        <text:list-item>
          <text:p text:style-name="P5">Buscan <text:span text:style-name="Strong_20_Emphasis">seguridad y respaldo</text:span> </text:p>
        </text:list-item>
        <text:list-item>
          <text:p text:style-name="P6">Menos afinidad con lo digital complejo </text:p>
        </text:list-item>
      </text:list>
      <text:p text:style-name="Text_20_body">👉 Estrategia: relación, respeto, claridad y paciencia</text:p>
      <text:p text:style-name="Horizontal_20_Line"/>
      <text:h text:style-name="Heading_20_3" text:outline-level="3">🧑 Generación X</text:h>
      <text:p text:style-name="Text_20_body"><text:span text:style-name="Strong_20_Emphasis">Cómo son:</text:span></text:p>
      <text:list text:style-name="L4">
        <text:list-item>
          <text:p text:style-name="P7">Equilibrio entre lo tradicional y lo digital </text:p>
        </text:list-item>
        <text:list-item>
          <text:p text:style-name="P7">Bastante <text:span text:style-name="Strong_20_Emphasis">pragmáticos</text:span> </text:p>
        </text:list-item>
        <text:list-item>
          <text:p text:style-name="P8">Valoran la <text:span text:style-name="Strong_20_Emphasis">eficiencia y resultados</text:span> </text:p>
        </text:list-item>
      </text:list>
      <text:p text:style-name="Text_20_body"><text:span text:style-name="Strong_20_Emphasis">En lo comercial:</text:span></text:p>
      <text:list text:style-name="L5">
        <text:list-item>
          <text:p text:style-name="P9">No quieren perder tiempo </text:p>
        </text:list-item>
        <text:list-item>
          <text:p text:style-name="P9">Analizan costo-beneficio </text:p>
        </text:list-item>
        <text:list-item>
          <text:p text:style-name="P10">Confían, pero verifican </text:p>
        </text:list-item>
      </text:list>
      <text:p text:style-name="Text_20_body"><text:soft-page-break/>👉 Estrategia: ir al punto + datos concretos + profesionalismo</text:p>
      <text:p text:style-name="Horizontal_20_Line"/>
      <text:h text:style-name="Heading_20_3" text:outline-level="3">🧑‍💼 Millennials (Gen Y)</text:h>
      <text:p text:style-name="Text_20_body"><text:span text:style-name="Strong_20_Emphasis">Cómo son:</text:span></text:p>
      <text:list text:style-name="L6">
        <text:list-item>
          <text:p text:style-name="P11">Muy familiarizados con lo digital </text:p>
        </text:list-item>
        <text:list-item>
          <text:p text:style-name="P11">Buscan <text:span text:style-name="Strong_20_Emphasis">experiencias</text:span>, no solo productos </text:p>
        </text:list-item>
        <text:list-item>
          <text:p text:style-name="P12">Valoran propósito, marca y reputación </text:p>
        </text:list-item>
      </text:list>
      <text:p text:style-name="Text_20_body"><text:span text:style-name="Strong_20_Emphasis">En lo comercial:</text:span></text:p>
      <text:list text:style-name="L7">
        <text:list-item>
          <text:p text:style-name="P13">Investigan antes de comprar </text:p>
        </text:list-item>
        <text:list-item>
          <text:p text:style-name="P13">Les importa la <text:span text:style-name="Strong_20_Emphasis">opinión de otros</text:span> (reviews) </text:p>
        </text:list-item>
        <text:list-item>
          <text:p text:style-name="P14">Prefieren comunicación ágil (WhatsApp, mail) </text:p>
        </text:list-item>
      </text:list>
      <text:p text:style-name="Text_20_body">👉 Estrategia: valor claro + autenticidad + presencia digital</text:p>
      <text:p text:style-name="Horizontal_20_Line"/>
      <text:h text:style-name="Heading_20_3" text:outline-level="3">📱 Generación Z</text:h>
      <text:p text:style-name="Text_20_body"><text:span text:style-name="Strong_20_Emphasis">Cómo son:</text:span></text:p>
      <text:list text:style-name="L8">
        <text:list-item>
          <text:p text:style-name="P15">100% digitales (nativos) </text:p>
        </text:list-item>
        <text:list-item>
          <text:p text:style-name="P15">Atención más corta, consumo rápido de info </text:p>
        </text:list-item>
        <text:list-item>
          <text:p text:style-name="P16">Valoran lo <text:span text:style-name="Strong_20_Emphasis">visual, directo y auténtico</text:span> </text:p>
        </text:list-item>
      </text:list>
      <text:p text:style-name="Text_20_body"><text:span text:style-name="Strong_20_Emphasis">En lo comercial:</text:span></text:p>
      <text:list text:style-name="L9">
        <text:list-item>
          <text:p text:style-name="P17">Desconfían del discurso “vende humo” </text:p>
        </text:list-item>
        <text:list-item>
          <text:p text:style-name="P17">Prefieren marcas/personas <text:span text:style-name="Strong_20_Emphasis">transparentes</text:span> </text:p>
        </text:list-item>
        <text:list-item>
          <text:p text:style-name="P18">Alta influencia de redes sociales </text:p>
        </text:list-item>
      </text:list>
      <text:p text:style-name="Text_20_body">👉 Estrategia: simple, rápido, visual y honesto</text:p>
      <text:p text:style-name="Horizontal_20_Line"/>
      <text:h text:style-name="Heading_20_2" text:outline-level="2">🎯 Cómo usar esto en una reunión</text:h>
      <text:p text:style-name="Text_20_body">No encasilles, pero sí ajustá el enfoque:</text:p>
      <text:list text:style-name="L10">
        <text:list-item>
          <text:p text:style-name="P19">Si es mayor → priorizá vínculo y confianza </text:p>
        </text:list-item>
        <text:list-item>
          <text:p text:style-name="P19">Si es intermedio (Gen X) → eficiencia y resultados </text:p>
        </text:list-item>
        <text:list-item>
          <text:p text:style-name="P20">Si es más joven → claridad, rapidez y valor concreto </text:p>
        </text:list-item>
      </text:list>
      <text:p text:style-name="Horizontal_20_Line"/>
      <text:h text:style-name="Heading_20_2" text:outline-level="2">⚠️ Punto clave</text:h>
      <text:p text:style-name="Text_20_body">La generación <text:span text:style-name="Strong_20_Emphasis">no define a la persona</text:span>, solo te da una probabilidad inicial.<text:line-break/>En una entrevista real, lo más importante sigue siendo:</text:p>
      <text:p text:style-name="Text_20_body">👉 escuchar y adaptar en el momento</text:p>
      <text:p text:style-name="Horizontal_20_Line"><text:soft-page-break/></text:p>
      <text:p text:style-name="Text_20_body">Si querés, decime aproximadamente qué edad tiene esta persona y qué le vas a ofrecer, y te ajusto un enfoque mucho más específico para esa reunión.</text:p>
      <text:p text:style-name="Text_20_body">que redes sociales son más comunes en cada grupo?</text:p>
      <text:p text:style-name="Text_20_body">Buena pregunta, porque acá sí podés ajustar bastante tu estrategia de contacto. Las redes que usa cada generación dicen mucho sobre <text:span text:style-name="Strong_20_Emphasis">cómo prefieren comunicarse y consumir información</text:span>.</text:p>
      <text:p text:style-name="Text_20_body">Te lo ordeno claro por grupo (pensado para Argentina y LATAM en general):</text:p>
      <text:p text:style-name="Horizontal_20_Line"/>
      <text:h text:style-name="Heading_20_2" text:outline-level="2">👴 Baby Boomers (62–80 años)</text:h>
      <text:p text:style-name="Text_20_body"><text:span text:style-name="Strong_20_Emphasis">Redes más comunes:</text:span></text:p>
      <text:list text:style-name="L11">
        <text:list-item>
          <text:p text:style-name="P21">Facebook </text:p>
        </text:list-item>
        <text:list-item>
          <text:p text:style-name="P21">YouTube </text:p>
        </text:list-item>
        <text:list-item>
          <text:p text:style-name="P22">WhatsApp </text:p>
        </text:list-item>
      </text:list>
      <text:p text:style-name="Text_20_body"><text:span text:style-name="Strong_20_Emphasis">Cómo las usan:</text:span></text:p>
      <text:list text:style-name="L12">
        <text:list-item>
          <text:p text:style-name="P23">Facebook para leer noticias, grupos y mantenerse en contacto </text:p>
        </text:list-item>
        <text:list-item>
          <text:p text:style-name="P23">WhatsApp es <text:span text:style-name="Strong_20_Emphasis">clave</text:span> (mucho más que mail a veces) </text:p>
        </text:list-item>
        <text:list-item>
          <text:p text:style-name="P24">YouTube para contenido práctico (tutoriales, info) </text:p>
        </text:list-item>
      </text:list>
      <text:p text:style-name="Text_20_body">👉 Si querés llegarles: mensaje claro + confianza + contacto directo</text:p>
      <text:p text:style-name="Horizontal_20_Line"/>
      <text:h text:style-name="Heading_20_2" text:outline-level="2">🧑 Generación X (46–61 años)</text:h>
      <text:p text:style-name="Text_20_body"><text:span text:style-name="Strong_20_Emphasis">Redes más comunes:</text:span></text:p>
      <text:list text:style-name="L13">
        <text:list-item>
          <text:p text:style-name="P25">Facebook </text:p>
        </text:list-item>
        <text:list-item>
          <text:p text:style-name="P25">WhatsApp </text:p>
        </text:list-item>
        <text:list-item>
          <text:p text:style-name="P25">LinkedIn </text:p>
        </text:list-item>
        <text:list-item>
          <text:p text:style-name="P26">YouTube </text:p>
        </text:list-item>
      </text:list>
      <text:p text:style-name="Text_20_body"><text:span text:style-name="Strong_20_Emphasis">Cómo las usan:</text:span></text:p>
      <text:list text:style-name="L14">
        <text:list-item>
          <text:p text:style-name="P27">Mezcla de personal y profesional </text:p>
        </text:list-item>
        <text:list-item>
          <text:p text:style-name="P27">LinkedIn empieza a tener peso </text:p>
        </text:list-item>
        <text:list-item>
          <text:p text:style-name="P28">WhatsApp sigue siendo canal fuerte </text:p>
        </text:list-item>
      </text:list>
      <text:p text:style-name="Text_20_body">👉 Si querés llegarles: profesional pero directo, sin vueltas</text:p>
      <text:p text:style-name="Horizontal_20_Line"/>
      <text:h text:style-name="Heading_20_2" text:outline-level="2">🧑‍💼 Millennials (30–45 años)</text:h>
      <text:p text:style-name="Text_20_body"><text:span text:style-name="Strong_20_Emphasis">Redes más comunes:</text:span></text:p>
      <text:list text:style-name="L15">
        <text:list-item>
          <text:p text:style-name="P29">Instagram </text:p>
        </text:list-item>
        <text:list-item>
          <text:p text:style-name="P29"><text:soft-page-break/>WhatsApp </text:p>
        </text:list-item>
        <text:list-item>
          <text:p text:style-name="P29">LinkedIn </text:p>
        </text:list-item>
        <text:list-item>
          <text:p text:style-name="P29">YouTube </text:p>
        </text:list-item>
        <text:list-item>
          <text:p text:style-name="P30">X (Twitter) </text:p>
        </text:list-item>
      </text:list>
      <text:p text:style-name="Text_20_body"><text:span text:style-name="Strong_20_Emphasis">Cómo las usan:</text:span></text:p>
      <text:list text:style-name="L16">
        <text:list-item>
          <text:p text:style-name="P31">Investigan antes de comprar </text:p>
        </text:list-item>
        <text:list-item>
          <text:p text:style-name="P31">Consumen contenido visual + reseñas </text:p>
        </text:list-item>
        <text:list-item>
          <text:p text:style-name="P32">Usan LinkedIn para negocios y networking </text:p>
        </text:list-item>
      </text:list>
      <text:p text:style-name="Text_20_body">👉 Si querés llegarles: presencia digital + reputación + contenido</text:p>
      <text:p text:style-name="Horizontal_20_Line"/>
      <text:h text:style-name="Heading_20_2" text:outline-level="2">📱 Generación Z (14–29 años)</text:h>
      <text:p text:style-name="Text_20_body"><text:span text:style-name="Strong_20_Emphasis">Redes más comunes:</text:span></text:p>
      <text:list text:style-name="L17">
        <text:list-item>
          <text:p text:style-name="P33">TikTok </text:p>
        </text:list-item>
        <text:list-item>
          <text:p text:style-name="P33">Instagram </text:p>
        </text:list-item>
        <text:list-item>
          <text:p text:style-name="P33">YouTube </text:p>
        </text:list-item>
        <text:list-item>
          <text:p text:style-name="P34">WhatsApp </text:p>
        </text:list-item>
      </text:list>
      <text:p text:style-name="Text_20_body"><text:span text:style-name="Strong_20_Emphasis">Cómo las usan:</text:span></text:p>
      <text:list text:style-name="L18">
        <text:list-item>
          <text:p text:style-name="P35">Consumo rápido, visual y directo </text:p>
        </text:list-item>
        <text:list-item>
          <text:p text:style-name="P35">Mucho video corto </text:p>
        </text:list-item>
        <text:list-item>
          <text:p text:style-name="P36">Baja tolerancia a contenido “lento” o muy formal </text:p>
        </text:list-item>
      </text:list>
      <text:p text:style-name="Text_20_body">👉 Si querés llegarles: simple, auténtico y rápido</text:p>
      <text:p text:style-name="Horizontal_20_Line"/>
      <text:h text:style-name="Heading_20_2" text:outline-level="2">🎯 Conclusión práctica</text:h>
      <text:p text:style-name="Text_20_body">Si no sabés la edad exacta de la persona:</text:p>
      <text:list text:style-name="L19">
        <text:list-item>
          <text:p text:style-name="P37"><text:span text:style-name="Strong_20_Emphasis">WhatsApp es universal</text:span> (sirve para casi todos) </text:p>
        </text:list-item>
        <text:list-item>
          <text:p text:style-name="P37"><text:span text:style-name="Strong_20_Emphasis">LinkedIn</text:span> → más profesional (Gen X / Millennials) </text:p>
        </text:list-item>
        <text:list-item>
          <text:p text:style-name="P37"><text:span text:style-name="Strong_20_Emphasis">Instagram</text:span> → bueno para mostrar valor visual </text:p>
        </text:list-item>
        <text:list-item>
          <text:p text:style-name="P38"><text:span text:style-name="Strong_20_Emphasis">Facebook</text:span> → útil para públicos más grandes </text:p>
        </text:list-item>
      </text:list>
      <text:p text:style-name="Horizontal_20_Line"/>
      <text:p text:style-name="Text_20_body">la generación de menores de 14 años tiene 1 nombre?</text:p>
      <text:p text:style-name="Text_20_body">Sí, aunque no hay un consenso 100% universal, a la generación posterior a la Generación Z (los menores de ~14 años hoy) se la suele llamar:</text:p>
      <text:h text:style-name="Heading_20_2" text:outline-level="2">👶 Generación Alpha (Gen Alpha)</text:h>
      <text:list text:style-name="L20">
        <text:list-item>
          <text:p text:style-name="P39">Nacidos aproximadamente entre <text:span text:style-name="Strong_20_Emphasis">2013 y 2025</text:span> </text:p>
        </text:list-item>
        <text:list-item>
          <text:p text:style-name="P40">Hoy (2026): <text:span text:style-name="Strong_20_Emphasis">0 a 13 años</text:span> </text:p>
        </text:list-item>
      </text:list>
      <text:p text:style-name="Horizontal_20_Line"><text:soft-page-break/></text:p>
      <text:h text:style-name="Heading_20_2" text:outline-level="2">🧠 Características generales</text:h>
      <text:list text:style-name="L21">
        <text:list-item>
          <text:p text:style-name="P41"><text:span text:style-name="Strong_20_Emphasis">100% nativos digitales extremos</text:span> (nacen con tablets, apps, IA, etc.) </text:p>
        </text:list-item>
        <text:list-item>
          <text:p text:style-name="P41">Mucha exposición a contenido audiovisual desde muy chicos </text:p>
        </text:list-item>
        <text:list-item>
          <text:p text:style-name="P41">Aprendizaje más visual e interactivo </text:p>
        </text:list-item>
        <text:list-item>
          <text:p text:style-name="P42">Fuerte influencia de padres Millennials </text:p>
        </text:list-item>
      </text:list>
      <text:p text:style-name="Horizontal_20_Line"/>
      <text:h text:style-name="Heading_20_2" text:outline-level="2">📱 Plataformas y consumo</text:h>
      <text:p text:style-name="Text_20_body">No es un grupo que use redes “tradicionales” como adultos, pero sí consumen mucho contenido en:</text:p>
      <text:list text:style-name="L22">
        <text:list-item>
          <text:p text:style-name="P43">YouTube </text:p>
        </text:list-item>
        <text:list-item>
          <text:p text:style-name="P43">YouTube Kids </text:p>
        </text:list-item>
        <text:list-item>
          <text:p text:style-name="P43">TikTok (los más grandes, a veces) </text:p>
        </text:list-item>
        <text:list-item>
          <text:p text:style-name="P44">Videojuegos online (tipo Roblox o Minecraft) </text:p>
        </text:list-item>
      </text:list>
      <text:p text:style-name="Horizontal_20_Line"/>
      <text:h text:style-name="Heading_20_2" text:outline-level="2">⚠️ Punto importante (clave comercial)</text:h>
      <text:p text:style-name="Text_20_body">No son decisores de compra directos en la mayoría de los casos.<text:line-break/>👉 <text:span text:style-name="Strong_20_Emphasis">Influyen</text:span>, pero quienes compran son los padres (generalmente Millennials).</text:p>
      <text:p text:style-name="Horizontal_20_Line"/>
      <text:h text:style-name="Heading_20_2" text:outline-level="2">🎯 En resumen</text:h>
      <text:list text:style-name="L23">
        <text:list-item>
          <text:p text:style-name="P45">Sí: <text:span text:style-name="Strong_20_Emphasis">Generación Alpha</text:span> </text:p>
        </text:list-item>
        <text:list-item>
          <text:p text:style-name="P45">Edad: 0–13 años aprox. </text:p>
        </text:list-item>
        <text:list-item>
          <text:p text:style-name="P46">Rol: consumidores indirectos (influyen más que compran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6:24:02.577979383</meta:creation-date>
    <dc:date>2026-04-20T16:24:42.046116467</dc:date>
    <meta:editing-duration>PT40S</meta:editing-duration>
    <meta:editing-cycles>1</meta:editing-cycles>
    <meta:document-statistic meta:table-count="0" meta:image-count="0" meta:object-count="0" meta:page-count="5" meta:paragraph-count="131" meta:word-count="889" meta:character-count="5086" meta:non-whitespace-character-count="4338"/>
    <meta:generator>LibreOffice/26.2.2.2$Linux_X86_64 LibreOffice_project/1f77d10d6938fd34972958f64b2bcfa54f8b1ba5</meta:generator>
  </office:meta>
</office:document-meta>
</file>