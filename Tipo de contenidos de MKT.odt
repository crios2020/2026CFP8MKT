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Title">
      <style:paragraph-properties fo:break-before="page"/>
    </style:style>
    <style:style style:name="P3" style:family="paragraph" style:parent-style-name="Standard">
      <style:text-properties officeooo:rsid="001a4dc3" officeooo:paragraph-rsid="001a4dc3"/>
    </style:style>
    <style:style style:name="P4" style:family="paragraph" style:parent-style-name="Text_20_body">
      <style:text-properties officeooo:rsid="001a4dc3" officeooo:paragraph-rsid="001a4dc3"/>
    </style:style>
    <style:style style:name="P5" style:family="paragraph" style:parent-style-name="Text_20_body">
      <style:text-properties officeooo:rsid="001a4dc3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1a4dc3"/>
    </style:style>
    <style:style style:name="P7" style:family="paragraph" style:parent-style-name="Text_20_body" style:list-style-name="L1">
      <style:text-properties officeooo:rsid="001a4dc3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1a4dc3"/>
    </style:style>
    <style:style style:name="P9" style:family="paragraph" style:parent-style-name="Text_20_body" style:list-style-name="L2">
      <style:text-properties officeooo:rsid="001a4dc3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1a4dc3"/>
    </style:style>
    <style:style style:name="P11" style:family="paragraph" style:parent-style-name="Text_20_body" style:list-style-name="L3">
      <style:text-properties officeooo:rsid="001a4dc3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officeooo:rsid="001a4dc3"/>
    </style:style>
    <style:style style:name="P13" style:family="paragraph" style:parent-style-name="Text_20_body" style:list-style-name="L4">
      <style:text-properties officeooo:rsid="001a4dc3"/>
    </style:style>
    <style:style style:name="P14" style:family="paragraph" style:parent-style-name="Text_20_body">
      <style:text-properties officeooo:rsid="001d9903" officeooo:paragraph-rsid="001d9903"/>
    </style:style>
    <style:style style:name="P15" style:family="paragraph" style:parent-style-name="Text_20_body">
      <style:text-properties officeooo:rsid="001d9903"/>
    </style:style>
    <style:style style:name="P16" style:family="paragraph" style:parent-style-name="Text_20_body" style:list-style-name="L5">
      <style:text-properties officeooo:rsid="001d9903"/>
    </style:style>
    <style:style style:name="P17" style:family="paragraph" style:parent-style-name="Text_20_body" style:list-style-name="L6">
      <style:paragraph-properties fo:margin-top="0cm" fo:margin-bottom="0cm" style:contextual-spacing="false"/>
      <style:text-properties officeooo:rsid="001d9903"/>
    </style:style>
    <style:style style:name="P18" style:family="paragraph" style:parent-style-name="Text_20_body" style:list-style-name="L6">
      <style:text-properties officeooo:rsid="001d9903"/>
    </style:style>
    <style:style style:name="P19" style:family="paragraph" style:parent-style-name="Text_20_body" style:list-style-name="L7">
      <style:paragraph-properties fo:margin-top="0cm" fo:margin-bottom="0cm" style:contextual-spacing="false"/>
      <style:text-properties officeooo:rsid="001d9903"/>
    </style:style>
    <style:style style:name="P20" style:family="paragraph" style:parent-style-name="Text_20_body" style:list-style-name="L7">
      <style:text-properties officeooo:rsid="001d9903"/>
    </style:style>
    <style:style style:name="P21" style:family="paragraph" style:parent-style-name="Text_20_body" style:list-style-name="L8">
      <style:paragraph-properties fo:margin-top="0cm" fo:margin-bottom="0cm" style:contextual-spacing="false"/>
      <style:text-properties officeooo:rsid="001d9903"/>
    </style:style>
    <style:style style:name="P22" style:family="paragraph" style:parent-style-name="Text_20_body" style:list-style-name="L8">
      <style:text-properties officeooo:rsid="001d9903"/>
    </style:style>
    <style:style style:name="P23" style:family="paragraph" style:parent-style-name="Text_20_body" style:list-style-name="L9">
      <style:paragraph-properties fo:margin-top="0cm" fo:margin-bottom="0cm" style:contextual-spacing="false"/>
      <style:text-properties officeooo:rsid="001d9903"/>
    </style:style>
    <style:style style:name="P24" style:family="paragraph" style:parent-style-name="Text_20_body" style:list-style-name="L9">
      <style:text-properties officeooo:rsid="001d9903"/>
    </style:style>
    <style:style style:name="P25" style:family="paragraph" style:parent-style-name="Text_20_body" style:list-style-name="L10">
      <style:paragraph-properties fo:margin-top="0cm" fo:margin-bottom="0cm" style:contextual-spacing="false"/>
      <style:text-properties officeooo:rsid="001d9903"/>
    </style:style>
    <style:style style:name="P26" style:family="paragraph" style:parent-style-name="Text_20_body" style:list-style-name="L10">
      <style:text-properties officeooo:rsid="001d9903"/>
    </style:style>
    <style:style style:name="P27" style:family="paragraph" style:parent-style-name="Text_20_body" style:list-style-name="L11">
      <style:paragraph-properties fo:margin-top="0cm" fo:margin-bottom="0cm" style:contextual-spacing="false"/>
      <style:text-properties officeooo:rsid="001d9903"/>
    </style:style>
    <style:style style:name="P28" style:family="paragraph" style:parent-style-name="Text_20_body" style:list-style-name="L11">
      <style:text-properties officeooo:rsid="001d9903"/>
    </style:style>
    <style:style style:name="P29" style:family="paragraph" style:parent-style-name="Text_20_body">
      <style:text-properties officeooo:rsid="001f7c3c" officeooo:paragraph-rsid="001f7c3c"/>
    </style:style>
    <style:style style:name="P30" style:family="paragraph" style:parent-style-name="Text_20_body">
      <style:text-properties officeooo:rsid="001f7c3c"/>
    </style:style>
    <style:style style:name="P31" style:family="paragraph" style:parent-style-name="Text_20_body" style:list-style-name="L12">
      <style:paragraph-properties fo:margin-top="0cm" fo:margin-bottom="0cm" style:contextual-spacing="false"/>
      <style:text-properties officeooo:rsid="001f7c3c"/>
    </style:style>
    <style:style style:name="P32" style:family="paragraph" style:parent-style-name="Text_20_body" style:list-style-name="L12">
      <style:text-properties officeooo:rsid="001f7c3c"/>
    </style:style>
    <style:style style:name="P33" style:family="paragraph" style:parent-style-name="Text_20_body" style:list-style-name="L13">
      <style:paragraph-properties fo:margin-top="0cm" fo:margin-bottom="0cm" style:contextual-spacing="false"/>
      <style:text-properties officeooo:rsid="001f7c3c"/>
    </style:style>
    <style:style style:name="P34" style:family="paragraph" style:parent-style-name="Text_20_body" style:list-style-name="L13">
      <style:text-properties officeooo:rsid="001f7c3c"/>
    </style:style>
    <style:style style:name="P35" style:family="paragraph" style:parent-style-name="Text_20_body" style:list-style-name="L14">
      <style:paragraph-properties fo:margin-top="0cm" fo:margin-bottom="0cm" style:contextual-spacing="false"/>
      <style:text-properties officeooo:rsid="001f7c3c"/>
    </style:style>
    <style:style style:name="P36" style:family="paragraph" style:parent-style-name="Text_20_body" style:list-style-name="L14">
      <style:text-properties officeooo:rsid="001f7c3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1"><text:a xlink:type="simple" xlink:href="#__RefHeading___Toc260_2149144809" office:name="Podcast" text:style-name="Index_20_Link" text:visited-style-name="Index_20_Link">Podcast<text:tab/>2</text:a></text:p>
          <text:p text:style-name="P1"><text:a xlink:type="simple" xlink:href="#__RefHeading___Toc262_2149144809" office:name="Blog" text:style-name="Index_20_Link" text:visited-style-name="Index_20_Link">Blog<text:tab/>2</text:a></text:p>
          <text:p text:style-name="P1"><text:a xlink:type="simple" xlink:href="#__RefHeading___Toc264_2149144809" office:name="Vlog" text:style-name="Index_20_Link" text:visited-style-name="Index_20_Link">Vlog<text:tab/>3</text:a></text:p>
          <text:p text:style-name="P1"><text:a xlink:type="simple" xlink:href="#__RefHeading___Toc266_2149144809" office:name="Streaming" text:style-name="Index_20_Link" text:visited-style-name="Index_20_Link">Streaming<text:tab/>3</text:a></text:p>
          <text:p text:style-name="P1"><text:a xlink:type="simple" xlink:href="#__RefHeading___Toc268_2149144809" office:name="Que es una lovemark?" text:style-name="Index_20_Link" text:visited-style-name="Index_20_Link">Que es una lovemark?<text:tab/>4</text:a></text:p>
        </text:index-body>
      </text:table-of-content>
      <text:p text:style-name="Title"/>
      <text:p text:style-name="P2">Tipos de contenidos.</text:p>
      <text:p text:style-name="P3"/>
      <text:h text:style-name="Heading_20_1" text:outline-level="1"><text:bookmark-start text:name="__RefHeading___Toc260_2149144809"/>Podcast<text:bookmark-end text:name="__RefHeading___Toc260_2149144809"/></text:h>
      <text:p text:style-name="P4">Un <text:span text:style-name="Strong_20_Emphasis">podcast</text:span> es un tipo de contenido de audio (como un programa de radio) que puedes escuchar por internet cuando quieras.</text:p>
      <text:p text:style-name="P5">👉 Se publica en episodios, como una serie.<text:line-break/>👉 Puedes escucharlo desde tu celular, computadora o tablet.<text:line-break/>👉 Hay podcasts de muchos temas: noticias, historias, educación, comedia, deportes, etc.</text:p>
      <text:p text:style-name="P5">Por ejemplo: puedes encontrar podcasts donde personas cuentan historias, enseñan algo o conversan sobre un tema.</text:p>
      <text:h text:style-name="Heading_20_1" text:outline-level="1"><text:bookmark-start text:name="__RefHeading___Toc262_2149144809"/>Blog<text:bookmark-end text:name="__RefHeading___Toc262_2149144809"/></text:h>
      <text:p text:style-name="P5">Un <text:span text:style-name="Strong_20_Emphasis">blog</text:span> es un sitio web o una sección de una página donde una persona o empresa publica artículos o contenidos de forma periódica.</text:p>
      <text:p text:style-name="P5">La palabra viene de <text:span text:style-name="Strong_20_Emphasis">“web log”</text:span> (registro web).</text:p>
      <text:p text:style-name="P5">En un blog normalmente encontrarás:</text:p>
      <text:list text:style-name="L1">
        <text:list-item>
          <text:p text:style-name="P6">artículos, </text:p>
        </text:list-item>
        <text:list-item>
          <text:p text:style-name="P6">opiniones, </text:p>
        </text:list-item>
        <text:list-item>
          <text:p text:style-name="P6">tutoriales, </text:p>
        </text:list-item>
        <text:list-item>
          <text:p text:style-name="P6">noticias, </text:p>
        </text:list-item>
        <text:list-item>
          <text:p text:style-name="P6">experiencias personales, </text:p>
        </text:list-item>
        <text:list-item>
          <text:p text:style-name="P7">guías o contenido educativo. </text:p>
        </text:list-item>
      </text:list>
      <text:p text:style-name="P5">Cada publicación se llama <text:span text:style-name="Strong_20_Emphasis">post</text:span> o <text:span text:style-name="Strong_20_Emphasis">entrada</text:span>.</text:p>
      <text:p text:style-name="P5">Ejemplos comunes de blogs:</text:p>
      <text:list text:style-name="L2">
        <text:list-item>
          <text:p text:style-name="P8">recetas de cocina, </text:p>
        </text:list-item>
        <text:list-item>
          <text:p text:style-name="P8">tecnología, </text:p>
        </text:list-item>
        <text:list-item>
          <text:p text:style-name="P8">viajes, </text:p>
        </text:list-item>
        <text:list-item>
          <text:p text:style-name="P8">programación, </text:p>
        </text:list-item>
        <text:list-item>
          <text:p text:style-name="P8">autos, </text:p>
        </text:list-item>
        <text:list-item>
          <text:p text:style-name="P8">marketing, </text:p>
        </text:list-item>
        <text:list-item>
          <text:p text:style-name="P9">diarios personales. </text:p>
        </text:list-item>
      </text:list>
      <text:p text:style-name="P5">La diferencia principal con un sitio web tradicional es que el blog se actualiza frecuentemente con nuevo contenido y suele mostrar las publicaciones por fecha.</text:p>
      <text:p text:style-name="P5">Por ejemplo:</text:p>
      <text:list text:style-name="L3">
        <text:list-item>
          <text:p text:style-name="P10">Un podcast es contenido principalmente de audio 🎧 </text:p>
        </text:list-item>
        <text:list-item>
          <text:p text:style-name="P11">Un blog es contenido principalmente escrito 📝 </text:p>
        </text:list-item>
      </text:list>
      <text:p text:style-name="P5"><text:soft-page-break/>Plataformas populares para crear blogs:</text:p>
      <text:list text:style-name="L4">
        <text:list-item>
          <text:p text:style-name="P12">WordPress </text:p>
        </text:list-item>
        <text:list-item>
          <text:p text:style-name="P12">Blogger </text:p>
        </text:list-item>
        <text:list-item>
          <text:p text:style-name="P13">Medium</text:p>
        </text:list-item>
      </text:list>
      <text:p text:style-name="P5"/>
      <text:h text:style-name="Heading_20_1" text:outline-level="1"><text:bookmark-start text:name="__RefHeading___Toc264_2149144809"/>Vlog<text:bookmark-end text:name="__RefHeading___Toc264_2149144809"/></text:h>
      <text:p text:style-name="P14">Un <text:span text:style-name="Strong_20_Emphasis">vlog</text:span> es un tipo de blog en formato de video.</text:p>
      <text:p text:style-name="P15">La palabra viene de:</text:p>
      <text:list text:style-name="L5">
        <text:list-item>
          <text:p text:style-name="P16"><text:span text:style-name="Strong_20_Emphasis">V</text:span>ideo + b<text:span text:style-name="Strong_20_Emphasis">log</text:span> = <text:span text:style-name="Strong_20_Emphasis">vlog</text:span> </text:p>
        </text:list-item>
      </text:list>
      <text:p text:style-name="P15">En lugar de escribir artículos, la persona graba videos contando experiencias, enseñando algo o mostrando actividades.</text:p>
      <text:p text:style-name="P15">Los vlogs suelen incluir:</text:p>
      <text:list text:style-name="L6">
        <text:list-item>
          <text:p text:style-name="P17">viajes, </text:p>
        </text:list-item>
        <text:list-item>
          <text:p text:style-name="P17">vida cotidiana, </text:p>
        </text:list-item>
        <text:list-item>
          <text:p text:style-name="P17">tecnología, </text:p>
        </text:list-item>
        <text:list-item>
          <text:p text:style-name="P17">cocina, </text:p>
        </text:list-item>
        <text:list-item>
          <text:p text:style-name="P17">videojuegos, </text:p>
        </text:list-item>
        <text:list-item>
          <text:p text:style-name="P17">tutoriales, </text:p>
        </text:list-item>
        <text:list-item>
          <text:p text:style-name="P17">opiniones, </text:p>
        </text:list-item>
        <text:list-item>
          <text:p text:style-name="P18">“día a día”. </text:p>
        </text:list-item>
      </text:list>
      <text:p text:style-name="P15">Generalmente se publican en plataformas como:</text:p>
      <text:list text:style-name="L7">
        <text:list-item>
          <text:p text:style-name="P19">YouTube </text:p>
        </text:list-item>
        <text:list-item>
          <text:p text:style-name="P19">TikTok </text:p>
        </text:list-item>
        <text:list-item>
          <text:p text:style-name="P20">Instagram </text:p>
        </text:list-item>
      </text:list>
      <text:p text:style-name="P15">Resumen rápido:</text:p>
      <text:list text:style-name="L8">
        <text:list-item>
          <text:p text:style-name="P21">📝 Blog → contenido escrito </text:p>
        </text:list-item>
        <text:list-item>
          <text:p text:style-name="P21">🎧 Podcast → contenido de audio </text:p>
        </text:list-item>
        <text:list-item>
          <text:p text:style-name="P22">🎥 Vlog → contenido en video</text:p>
        </text:list-item>
      </text:list>
      <text:p text:style-name="P14"/>
      <text:h text:style-name="Heading_20_1" text:outline-level="1"><text:bookmark-start text:name="__RefHeading___Toc266_2149144809"/>Streaming<text:bookmark-end text:name="__RefHeading___Toc266_2149144809"/></text:h>
      <text:p text:style-name="P14">El <text:span text:style-name="Strong_20_Emphasis">streaming</text:span> es una tecnología que permite ver o escuchar contenido por internet en tiempo real, sin necesidad de descargar el archivo completo antes.</text:p>
      <text:p text:style-name="P15">Por ejemplo:</text:p>
      <text:list text:style-name="L9">
        <text:list-item>
          <text:p text:style-name="P23">ver una película online, </text:p>
        </text:list-item>
        <text:list-item>
          <text:p text:style-name="P23">escuchar música, </text:p>
        </text:list-item>
        <text:list-item>
          <text:p text:style-name="P23">mirar una transmisión en vivo, </text:p>
        </text:list-item>
        <text:list-item>
          <text:p text:style-name="P24"><text:soft-page-break/>jugar videojuegos desde la nube. </text:p>
        </text:list-item>
      </text:list>
      <text:p text:style-name="P15">Cuando usas streaming, el contenido se reproduce mientras se va descargando parcialmente en segundo plano.</text:p>
      <text:p text:style-name="P15">Tipos comunes de streaming:</text:p>
      <text:list text:style-name="L10">
        <text:list-item>
          <text:p text:style-name="P25">🎬 Video → películas y series </text:p>
        </text:list-item>
        <text:list-item>
          <text:p text:style-name="P25">🎧 Audio → música y podcasts </text:p>
        </text:list-item>
        <text:list-item>
          <text:p text:style-name="P25">🔴 En vivo → transmisiones en directo </text:p>
        </text:list-item>
        <text:list-item>
          <text:p text:style-name="P26">🎮 Gaming → juegos en la nube </text:p>
        </text:list-item>
      </text:list>
      <text:p text:style-name="P15">Plataformas populares:</text:p>
      <text:list text:style-name="L11">
        <text:list-item>
          <text:p text:style-name="P27">Netflix </text:p>
        </text:list-item>
        <text:list-item>
          <text:p text:style-name="P27">Spotify </text:p>
        </text:list-item>
        <text:list-item>
          <text:p text:style-name="P27">YouTube </text:p>
        </text:list-item>
        <text:list-item>
          <text:p text:style-name="P27">Twitch </text:p>
        </text:list-item>
        <text:list-item>
          <text:p text:style-name="P28">Disney+ </text:p>
        </text:list-item>
      </text:list>
      <text:p text:style-name="P15">Ejemplo simple:<text:line-break/>Antes:<text:line-break/>⬇️ descargabas una película completa para verla.</text:p>
      <text:p text:style-name="P15">Ahora con streaming:<text:line-break/>▶️ la ves instantáneamente mientras internet envía los datos.</text:p>
      <text:p text:style-name="P14"/>
      <text:p text:style-name="Title">LoveMark</text:p>
      <text:h text:style-name="Heading_20_1" text:outline-level="1"><text:bookmark-start text:name="__RefHeading___Toc268_2149144809"/>Que es una lovemark?<text:bookmark-end text:name="__RefHeading___Toc268_2149144809"/></text:h>
      <text:p text:style-name="P29">Una <text:span text:style-name="Strong_20_Emphasis">Lovemark</text:span> es una marca que logra generar una conexión emocional muy fuerte con las personas, más allá de simplemente vender un producto o servicio.</text:p>
      <text:p text:style-name="P30">El concepto fue popularizado por Kevin Roberts, ex CEO de Saatchi &amp; Saatchi.</text:p>
      <text:p text:style-name="P30">La idea es que una Lovemark no solo tiene clientes, sino también seguidores o fans que:</text:p>
      <text:list text:style-name="L12">
        <text:list-item>
          <text:p text:style-name="P31">sienten cariño por la marca, </text:p>
        </text:list-item>
        <text:list-item>
          <text:p text:style-name="P31">la recomiendan, </text:p>
        </text:list-item>
        <text:list-item>
          <text:p text:style-name="P31">la prefieren aunque existan alternativas, </text:p>
        </text:list-item>
        <text:list-item>
          <text:p text:style-name="P32">se identifican emocionalmente con ella. </text:p>
        </text:list-item>
      </text:list>
      <text:p text:style-name="P30">Una Lovemark combina:</text:p>
      <text:list text:style-name="L13">
        <text:list-item>
          <text:p text:style-name="P33">❤️ emoción </text:p>
        </text:list-item>
        <text:list-item>
          <text:p text:style-name="P33">🤝 confianza </text:p>
        </text:list-item>
        <text:list-item>
          <text:p text:style-name="P33">⭐ experiencia </text:p>
        </text:list-item>
        <text:list-item>
          <text:p text:style-name="P34">🧠 identidad de marca </text:p>
        </text:list-item>
      </text:list>
      <text:p text:style-name="P30"><text:soft-page-break/>Ejemplos de marcas que muchas personas consideran Lovemarks:</text:p>
      <text:list text:style-name="L14">
        <text:list-item>
          <text:p text:style-name="P35">Apple </text:p>
        </text:list-item>
        <text:list-item>
          <text:p text:style-name="P35">Coca-Cola </text:p>
        </text:list-item>
        <text:list-item>
          <text:p text:style-name="P35">Nike </text:p>
        </text:list-item>
        <text:list-item>
          <text:p text:style-name="P36">Disney </text:p>
        </text:list-item>
      </text:list>
      <text:p text:style-name="P30">Por ejemplo:<text:line-break/>Alguien puede necesitar simplemente un teléfono, pero elegir un iPhone porque siente afinidad con la marca, su diseño o lo que representa. Esa conexión emocional es parte del concepto de Lovemark.</text:p>
      <text:p text:style-name="P29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6:49:16.853701061</meta:creation-date>
    <dc:date>2026-04-29T17:57:41.284723442</dc:date>
    <meta:editing-duration>PT28M3S</meta:editing-duration>
    <meta:editing-cycles>3</meta:editing-cycles>
    <meta:generator>LibreOffice/26.2.2.2$Linux_X86_64 LibreOffice_project/1f77d10d6938fd34972958f64b2bcfa54f8b1ba5</meta:generator>
    <meta:document-statistic meta:table-count="0" meta:image-count="0" meta:object-count="0" meta:page-count="5" meta:paragraph-count="101" meta:word-count="592" meta:character-count="3454" meta:non-whitespace-character-count="2965"/>
  </office:meta>
</office:document-meta>
</file>