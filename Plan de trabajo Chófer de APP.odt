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paragraph-properties fo:margin-top="0cm" fo:margin-bottom="0cm" style:contextual-spacing="false"/>
    </style:style>
    <style:style style:name="P47" style:family="paragraph" style:parent-style-name="Text_20_body" style:list-style-name="L25"/>
    <style:style style:name="P48" style:family="paragraph" style:parent-style-name="Text_20_body" style:list-style-name="L26">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7">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8">
      <style:paragraph-properties fo:margin-top="0cm" fo:margin-bottom="0cm" style:contextual-spacing="false"/>
    </style:style>
    <style:style style:name="P53" style:family="paragraph" style:parent-style-name="Text_20_body" style:list-style-name="L28"/>
    <style:style style:name="P54" style:family="paragraph" style:parent-style-name="Text_20_body" style:list-style-name="L29">
      <style:paragraph-properties fo:margin-top="0cm" fo:margin-bottom="0cm" style:contextual-spacing="false"/>
    </style:style>
    <style:style style:name="P55" style:family="paragraph" style:parent-style-name="Text_20_body" style:list-style-name="L29"/>
    <style:style style:name="P56" style:family="paragraph" style:parent-style-name="Text_20_body" style:list-style-name="L30">
      <style:paragraph-properties fo:margin-top="0cm" fo:margin-bottom="0cm" style:contextual-spacing="false"/>
    </style:style>
    <style:style style:name="P57" style:family="paragraph" style:parent-style-name="Text_20_body" style:list-style-name="L30"/>
    <style:style style:name="P58" style:family="paragraph" style:parent-style-name="Text_20_body" style:list-style-name="L31">
      <style:paragraph-properties fo:margin-top="0cm" fo:margin-bottom="0cm" style:contextual-spacing="false"/>
    </style:style>
    <style:style style:name="P59" style:family="paragraph" style:parent-style-name="Text_20_body" style:list-style-name="L31"/>
    <style:style style:name="P60" style:family="paragraph" style:parent-style-name="Text_20_body" style:list-style-name="L32">
      <style:paragraph-properties fo:margin-top="0cm" fo:margin-bottom="0cm" style:contextual-spacing="false"/>
    </style:style>
    <style:style style:name="P61" style:family="paragraph" style:parent-style-name="Text_20_body" style:list-style-name="L32"/>
    <style:style style:name="P62" style:family="paragraph" style:parent-style-name="Text_20_body" style:list-style-name="L33">
      <style:paragraph-properties fo:margin-top="0cm" fo:margin-bottom="0cm" style:contextual-spacing="false"/>
    </style:style>
    <style:style style:name="P63" style:family="paragraph" style:parent-style-name="Text_20_body" style:list-style-name="L33"/>
    <style:style style:name="P64" style:family="paragraph" style:parent-style-name="Text_20_body" style:list-style-name="L34">
      <style:paragraph-properties fo:margin-top="0cm" fo:margin-bottom="0cm" style:contextual-spacing="false"/>
    </style:style>
    <style:style style:name="P65" style:family="paragraph" style:parent-style-name="Text_20_body" style:list-style-name="L34"/>
    <style:style style:name="P66" style:family="paragraph" style:parent-style-name="Text_20_body" style:list-style-name="L35">
      <style:paragraph-properties fo:margin-top="0cm" fo:margin-bottom="0cm" style:contextual-spacing="false"/>
    </style:style>
    <style:style style:name="P67" style:family="paragraph" style:parent-style-name="Text_20_body" style:list-style-name="L35"/>
    <style:style style:name="P68" style:family="paragraph" style:parent-style-name="Text_20_body" style:list-style-name="L36">
      <style:paragraph-properties fo:margin-top="0cm" fo:margin-bottom="0cm" style:contextual-spacing="false"/>
    </style:style>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paragraph-properties fo:margin-top="0cm" fo:margin-bottom="0cm" style:contextual-spacing="false"/>
    </style:style>
    <style:style style:name="P72" style:family="paragraph" style:parent-style-name="Text_20_body" style:list-style-name="L38"/>
    <style:style style:name="P73" style:family="paragraph" style:parent-style-name="Text_20_body" style:list-style-name="L39">
      <style:paragraph-properties fo:margin-top="0cm" fo:margin-bottom="0cm" style:contextual-spacing="false"/>
    </style:style>
    <style:style style:name="P74" style:family="paragraph" style:parent-style-name="Text_20_body" style:list-style-name="L39"/>
    <style:style style:name="P75" style:family="paragraph" style:parent-style-name="Text_20_body" style:list-style-name="L40">
      <style:paragraph-properties fo:margin-top="0cm" fo:margin-bottom="0cm" style:contextual-spacing="false"/>
    </style:style>
    <style:style style:name="P76" style:family="paragraph" style:parent-style-name="Text_20_body" style:list-style-name="L40"/>
    <style:style style:name="P77" style:family="paragraph" style:parent-style-name="Text_20_body" style:list-style-name="L41">
      <style:paragraph-properties fo:margin-top="0cm" fo:margin-bottom="0cm" style:contextual-spacing="false"/>
    </style:style>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3">
      <style:paragraph-properties fo:margin-top="0cm" fo:margin-bottom="0cm" style:contextual-spacing="false"/>
    </style:style>
    <style:style style:name="P81" style:family="paragraph" style:parent-style-name="Text_20_body" style:list-style-name="L43"/>
    <style:style style:name="P82" style:family="paragraph" style:parent-style-name="Text_20_body" style:list-style-name="L44">
      <style:paragraph-properties fo:margin-top="0cm" fo:margin-bottom="0cm" style:contextual-spacing="false"/>
    </style:style>
    <style:style style:name="P83" style:family="paragraph" style:parent-style-name="Text_20_body" style:list-style-name="L44"/>
    <style:style style:name="P84" style:family="paragraph" style:parent-style-name="Text_20_body" style:list-style-name="L45">
      <style:paragraph-properties fo:margin-top="0cm" fo:margin-bottom="0cm" style:contextual-spacing="false"/>
    </style:style>
    <style:style style:name="P85" style:family="paragraph" style:parent-style-name="Text_20_body" style:list-style-name="L45"/>
    <style:style style:name="P86" style:family="paragraph" style:parent-style-name="Text_20_body" style:list-style-name="L46">
      <style:paragraph-properties fo:margin-top="0cm" fo:margin-bottom="0cm" style:contextual-spacing="false"/>
    </style:style>
    <style:style style:name="P87" style:family="paragraph" style:parent-style-name="Text_20_body" style:list-style-name="L46"/>
    <style:style style:name="P88" style:family="paragraph" style:parent-style-name="Text_20_body" style:list-style-name="L47">
      <style:paragraph-properties fo:margin-top="0cm" fo:margin-bottom="0cm" style:contextual-spacing="false"/>
    </style:style>
    <style:style style:name="P89" style:family="paragraph" style:parent-style-name="Text_20_body" style:list-style-name="L4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ero empezar a ser chófer de aplicaciones, vivo en provincia de Buenos Aires, en la localidad de Ituzaingo zona oeste, quiero maximizar las ganancias. Necesito saber cual es la mejor app, la mejor zona, los mejores días y horarios para esta actividad?</text:p>
      <text:p text:style-name="Text_20_body">Te lo voy a decir sin vueltas: <text:span text:style-name="Strong_20_Emphasis">no existe “la mejor app” sola</text:span>, ni “la mejor zona fija”. Los que más ganan en Buenos Aires combinan <text:span text:style-name="Strong_20_Emphasis">apps + zonas + horarios</text:span> como estrategia. Si hacés eso bien, podés marcar mucha diferencia.</text:p>
      <text:p text:style-name="Horizontal_20_Line"/>
      <text:h text:style-name="Heading_20_1" text:outline-level="1">🚗 1. ¿Cuál es la mejor app en Argentina?</text:h>
      <text:p text:style-name="Text_20_body">Las principales son:</text:p>
      <text:list text:style-name="L1">
        <text:list-item>
          <text:p text:style-name="P2">Uber </text:p>
        </text:list-item>
        <text:list-item>
          <text:p text:style-name="P2">Cabify </text:p>
        </text:list-item>
        <text:list-item>
          <text:p text:style-name="P3">DiDi </text:p>
        </text:list-item>
      </text:list>
      <text:h text:style-name="Heading_20_3" text:outline-level="3">🏆 Conclusión realista:</text:h>
      <text:list text:style-name="L2">
        <text:list-item>
          <text:p text:style-name="P4"><text:span text:style-name="Strong_20_Emphasis">Uber</text:span> → más demanda (más viajes, menos tiempos muertos) </text:p>
        </text:list-item>
        <text:list-item>
          <text:p text:style-name="P4"><text:span text:style-name="Strong_20_Emphasis">Cabify</text:span> → mejores tarifas/promos en ciertos horarios (mejor cliente) </text:p>
        </text:list-item>
        <text:list-item>
          <text:p text:style-name="P5"><text:span text:style-name="Strong_20_Emphasis">DiDi</text:span> → más barato → más viajes, pero menor ganancia por viaje </text:p>
        </text:list-item>
      </text:list>
      <text:p text:style-name="Text_20_body">👉 Por eso, los choferes que más ganan usan <text:span text:style-name="Strong_20_Emphasis">las 2 o 3 apps al mismo tiempo</text:span>.</text:p>
      <text:p text:style-name="Text_20_body">✔ Esto está recontra comprobado: la ganancia depende de <text:span text:style-name="Strong_20_Emphasis">demanda + horarios + zona + viajes aceptados</text:span>, no de una sola app </text:p>
      <text:p text:style-name="Horizontal_20_Line"/>
      <text:h text:style-name="Heading_20_1" text:outline-level="1">💰 2. ¿Cuánto se gana realmente?</text:h>
      <text:list text:style-name="L3">
        <text:list-item>
          <text:p text:style-name="P6">Promedio: desde ~$1400 por hora (puede ser mucho más hoy con inflación) </text:p>
        </text:list-item>
        <text:list-item>
          <text:p text:style-name="P6">Full time (muchas horas): puede escalar fuerte según zona y demanda </text:p>
        </text:list-item>
        <text:list-item>
          <text:p text:style-name="P7">Ejemplo reciente: choferes pueden llegar a ingresos altos dependiendo de horas y estrategia </text:p>
        </text:list-item>
      </text:list>
      <text:p text:style-name="Text_20_body">👉 Traducción práctica:</text:p>
      <text:list text:style-name="L4">
        <text:list-item>
          <text:p text:style-name="P8">Si manejás mal los horarios → ganás poco </text:p>
        </text:list-item>
        <text:list-item>
          <text:p text:style-name="P9">Si manejás bien → podés duplicar ingresos </text:p>
        </text:list-item>
      </text:list>
      <text:p text:style-name="Horizontal_20_Line"/>
      <text:h text:style-name="Heading_20_1" text:outline-level="1">📍 3. Mejores zonas (clave para vos en Ituzaingó)</text:h>
      <text:p text:style-name="Text_20_body">Vivís en zona oeste, así que esto es CLAVE:</text:p>
      <text:h text:style-name="Heading_20_3" text:outline-level="3"><text:soft-page-break/>🟢 Zonas más rentables:</text:h>
      <text:list text:style-name="L5">
        <text:list-item>
          <text:p text:style-name="P10">CABA (sobre todo): </text:p>
          <text:list>
            <text:list-item>
              <text:p text:style-name="P10">Palermo </text:p>
            </text:list-item>
            <text:list-item>
              <text:p text:style-name="P10">Recoleta </text:p>
            </text:list-item>
            <text:list-item>
              <text:p text:style-name="P10">Microcentro </text:p>
            </text:list-item>
            <text:list-item>
              <text:p text:style-name="P10">Belgrano </text:p>
            </text:list-item>
          </text:list>
        </text:list-item>
        <text:list-item>
          <text:p text:style-name="P10">Aeropuertos: </text:p>
          <text:list>
            <text:list-item>
              <text:p text:style-name="P10">Ezeiza </text:p>
            </text:list-item>
            <text:list-item>
              <text:p text:style-name="P10">Aeroparque </text:p>
            </text:list-item>
          </text:list>
        </text:list-item>
        <text:list-item>
          <text:p text:style-name="P10">Corredores de alto movimiento: </text:p>
          <text:list>
            <text:list-item>
              <text:p text:style-name="P11">Acceso Oeste → Capital </text:p>
            </text:list-item>
          </text:list>
        </text:list-item>
      </text:list>
      <text:p text:style-name="Text_20_body">👉 Estrategia ganadora:</text:p>
      <text:list text:style-name="L6">
        <text:list-item>
          <text:p text:style-name="P12">Salís desde Ituzaingó </text:p>
        </text:list-item>
        <text:list-item>
          <text:p text:style-name="P12">Buscás un viaje largo a Capital </text:p>
        </text:list-item>
        <text:list-item>
          <text:p text:style-name="P12">Te quedás laburando ahí </text:p>
        </text:list-item>
        <text:list-item>
          <text:p text:style-name="P13">Volvés con otro viaje pago </text:p>
        </text:list-item>
      </text:list>
      <text:p text:style-name="Text_20_body">⚠️ Error típico: quedarse en zona oeste esperando viajes cortos → perdés plata.</text:p>
      <text:p text:style-name="Horizontal_20_Line"/>
      <text:h text:style-name="Heading_20_1" text:outline-level="1">⏰ 4. Mejores días y horarios</text:h>
      <text:p text:style-name="Text_20_body">Esto es lo MÁS importante.</text:p>
      <text:h text:style-name="Heading_20_3" text:outline-level="3">🕗 Días de semana:</text:h>
      <text:list text:style-name="L7">
        <text:list-item>
          <text:p text:style-name="P14">07:00 a 10:00 → gente yendo a trabajar </text:p>
        </text:list-item>
        <text:list-item>
          <text:p text:style-name="P15">17:00 a 21:00 → regreso </text:p>
        </text:list-item>
      </text:list>
      <text:h text:style-name="Heading_20_3" text:outline-level="3">🌙 Noche (MUY rentable):</text:h>
      <text:list text:style-name="L8">
        <text:list-item>
          <text:p text:style-name="P16">22:00 a 03:00 → salidas, bares, boliches </text:p>
        </text:list-item>
        <text:list-item>
          <text:p text:style-name="P17">Especialmente jueves, viernes y sábado </text:p>
        </text:list-item>
      </text:list>
      <text:h text:style-name="Heading_20_3" text:outline-level="3">🎉 Fines de semana:</text:h>
      <text:list text:style-name="L9">
        <text:list-item>
          <text:p text:style-name="P18">Viernes y sábado noche → lo mejor de todo </text:p>
        </text:list-item>
        <text:list-item>
          <text:p text:style-name="P19">Eventos, recitales, partidos → picos de tarifa </text:p>
        </text:list-item>
      </text:list>
      <text:p text:style-name="Text_20_body">✔ La tarifa dinámica (más $$$) aparece cuando hay alta demanda </text:p>
      <text:p text:style-name="Horizontal_20_Line"/>
      <text:h text:style-name="Heading_20_1" text:outline-level="1">🧠 5. Estrategia PRO para maximizar ganancias</text:h>
      <text:p text:style-name="Text_20_body">Te dejo lo que realmente hace la diferencia:</text:p>
      <text:h text:style-name="Heading_20_3" text:outline-level="3"><text:soft-page-break/>🔑 1. Trabajar con varias apps</text:h>
      <text:p text:style-name="Text_20_body">Nunca dependas de una sola.</text:p>
      <text:h text:style-name="Heading_20_3" text:outline-level="3">🔑 2. Elegir bien los viajes</text:h>
      <text:list text:style-name="L10">
        <text:list-item>
          <text:p text:style-name="P20">Evitá viajes cortos en zonas malas </text:p>
        </text:list-item>
        <text:list-item>
          <text:p text:style-name="P20">Priorizá: </text:p>
          <text:list>
            <text:list-item>
              <text:p text:style-name="P20">viajes largos </text:p>
            </text:list-item>
            <text:list-item>
              <text:p text:style-name="P21">destinos hacia zonas activas </text:p>
            </text:list-item>
          </text:list>
        </text:list-item>
      </text:list>
      <text:p text:style-name="Text_20_body">👉 Hay apps como <text:span text:style-name="Strong_20_Emphasis">Viaje Rentable</text:span> que calculan $/km y $/hora en tiempo real </text:p>
      <text:p text:style-name="Horizontal_20_Line"/>
      <text:h text:style-name="Heading_20_3" text:outline-level="3">🔑 3. Pensar en “$ por hora”, no por viaje</text:h>
      <text:p text:style-name="Text_20_body">Un viaje largo con tráfico puede ser peor que 3 cortos rápidos.</text:p>
      <text:p text:style-name="Horizontal_20_Line"/>
      <text:h text:style-name="Heading_20_3" text:outline-level="3">🔑 4. Evitar tiempos muertos</text:h>
      <text:list text:style-name="L11">
        <text:list-item>
          <text:p text:style-name="P22">Si estás 20 min sin viajes → estás perdiendo plata </text:p>
        </text:list-item>
        <text:list-item>
          <text:p text:style-name="P23">Movete siempre hacia zonas calientes </text:p>
        </text:list-item>
      </text:list>
      <text:p text:style-name="Horizontal_20_Line"/>
      <text:h text:style-name="Heading_20_3" text:outline-level="3">🔑 5. Combustible (CLAVE)</text:h>
      <text:list text:style-name="L12">
        <text:list-item>
          <text:p text:style-name="P24">GNC = ventaja enorme </text:p>
        </text:list-item>
        <text:list-item>
          <text:p text:style-name="P25">Si usás nafta → tu margen baja mucho </text:p>
        </text:list-item>
      </text:list>
      <text:p text:style-name="Horizontal_20_Line"/>
      <text:h text:style-name="Heading_20_1" text:outline-level="1">⚠️ 6. Realidad que nadie te dice</text:h>
      <text:p text:style-name="Text_20_body">Te lo dejo claro para que no te comas el verso:</text:p>
      <text:list text:style-name="L13">
        <text:list-item>
          <text:p text:style-name="P26">El auto se desgasta MUCHO </text:p>
        </text:list-item>
        <text:list-item>
          <text:p text:style-name="P26">Mantenimiento constante </text:p>
        </text:list-item>
        <text:list-item>
          <text:p text:style-name="P26">Inseguridad según zona </text:p>
        </text:list-item>
        <text:list-item>
          <text:p text:style-name="P27">Ganancia real = ingresos − gastos </text:p>
        </text:list-item>
      </text:list>
      <text:p text:style-name="Text_20_body">👉 Muchos creen que ganan mucho, pero no descuentan costos.</text:p>
      <text:p text:style-name="Horizontal_20_Line"/>
      <text:h text:style-name="Heading_20_1" text:outline-level="1">🎯 Conclusión clara</text:h>
      <text:p text:style-name="Text_20_body">Si querés maximizar ganancias desde Ituzaingó:</text:p>
      <text:p text:style-name="Text_20_body">✔ Usá Uber + Cabify + DiDi<text:line-break/>✔ Trabajá horarios pico (mañana, tarde y noche)<text:line-break/><text:soft-page-break/>✔ Movete hacia CABA<text:line-break/>✔ Evitá quedarte quieto en zona oeste<text:line-break/>✔ Elegí bien los viajes<text:line-break/>✔ Pensá siempre en $/hora</text:p>
      <text:p text:style-name="Horizontal_20_Line"/>
      <text:p text:style-name="Text_20_body">Si querés, te puedo armar un <text:span text:style-name="Strong_20_Emphasis">plan semanal tipo “rutina de chofer”</text:span> optimizado para zona oeste (día por día con horarios exactos).</text:p>
      <text:p text:style-name="Text_20_body">armar un plan semanal tipo “rutina de chofer” optimizado para zona oeste (día por día con horarios exactos).</text:p>
      <text:p text:style-name="Text_20_body">Perfecto, vamos a armarte una <text:span text:style-name="Strong_20_Emphasis">rutina semanal realista y optimizada desde Ituzaingó (zona oeste)</text:span>, pensada para <text:span text:style-name="Strong_20_Emphasis">maximizar $/hora</text:span>, reducir tiempos muertos y aprovechar los picos de demanda.</text:p>
      <text:p text:style-name="Text_20_body">La lógica base del plan es:</text:p>
      <text:list text:style-name="L14">
        <text:list-item>
          <text:p text:style-name="P28"><text:span text:style-name="Strong_20_Emphasis">Ir a CABA en horas pico</text:span> </text:p>
        </text:list-item>
        <text:list-item>
          <text:p text:style-name="P28"><text:span text:style-name="Strong_20_Emphasis">Trabajar donde hay demanda (no donde vivís)</text:span> </text:p>
        </text:list-item>
        <text:list-item>
          <text:p text:style-name="P28"><text:span text:style-name="Strong_20_Emphasis">Volver siempre con viaje pago</text:span> </text:p>
        </text:list-item>
        <text:list-item>
          <text:p text:style-name="P29"><text:span text:style-name="Strong_20_Emphasis">Priorizar noche de fin de semana (la más rentable)</text:span> </text:p>
        </text:list-item>
      </text:list>
      <text:p text:style-name="Horizontal_20_Line"/>
      <text:h text:style-name="Heading_20_1" text:outline-level="1">🚗 🗓️ Rutina semanal de chofer (zona oeste → CABA)</text:h>
      <text:h text:style-name="Heading_20_2" text:outline-level="2">🔵 Lunes</text:h>
      <text:p text:style-name="Text_20_body">🕗 06:30 – 10:30</text:p>
      <text:list text:style-name="L15">
        <text:list-item>
          <text:p text:style-name="P30">Salís de Ituzaingó </text:p>
        </text:list-item>
        <text:list-item>
          <text:p text:style-name="P30">Buscás viaje largo hacia Capital </text:p>
        </text:list-item>
        <text:list-item>
          <text:p text:style-name="P31">Trabajás ingreso laboral (oficinas) </text:p>
        </text:list-item>
      </text:list>
      <text:p text:style-name="Text_20_body">🕔 17:00 – 20:30</text:p>
      <text:list text:style-name="L16">
        <text:list-item>
          <text:p text:style-name="P32">Zona recomendada: Palermo / Microcentro </text:p>
        </text:list-item>
        <text:list-item>
          <text:p text:style-name="P33">Viajes de regreso (alto flujo) </text:p>
        </text:list-item>
      </text:list>
      <text:p text:style-name="Text_20_body">👉 Día tranquilo → no estires de más</text:p>
      <text:p text:style-name="Horizontal_20_Line"/>
      <text:h text:style-name="Heading_20_2" text:outline-level="2">🔵 Martes</text:h>
      <text:p text:style-name="Text_20_body">🕗 07:00 – 10:30<text:line-break/>🕔 17:30 – 21:00</text:p>
      <text:p text:style-name="Text_20_body"><text:soft-page-break/>👉 Igual que lunes pero suele haber un poco más de movimiento<text:line-break/>👉 Probá activar 2 apps (ej: Uber + Cabify)</text:p>
      <text:p text:style-name="Horizontal_20_Line"/>
      <text:h text:style-name="Heading_20_2" text:outline-level="2">🔵 Miércoles</text:h>
      <text:p text:style-name="Text_20_body">🕗 07:00 – 10:30<text:line-break/>🕔 17:30 – 21:30</text:p>
      <text:p text:style-name="Text_20_body">👉 Día “puente” (empieza a subir la demanda nocturna)</text:p>
      <text:p text:style-name="Text_20_body">🌙 OPCIONAL: 22:30 – 01:30</text:p>
      <text:list text:style-name="L17">
        <text:list-item>
          <text:p text:style-name="P34">Zona Palermo / bares </text:p>
        </text:list-item>
        <text:list-item>
          <text:p text:style-name="P35">Ya empieza a rendir la noche </text:p>
        </text:list-item>
      </text:list>
      <text:p text:style-name="Horizontal_20_Line"/>
      <text:h text:style-name="Heading_20_2" text:outline-level="2">🔵 Jueves (IMPORTANTE)</text:h>
      <text:p text:style-name="Text_20_body">🕗 07:00 – 10:30<text:line-break/>🕔 18:00 – 22:00</text:p>
      <text:p text:style-name="Text_20_body">🌙 23:00 – 02:30</text:p>
      <text:list text:style-name="L18">
        <text:list-item>
          <text:p text:style-name="P36">Alta demanda nocturna </text:p>
        </text:list-item>
        <text:list-item>
          <text:p text:style-name="P36">Mucho movimiento en: </text:p>
          <text:list>
            <text:list-item>
              <text:p text:style-name="P36">Palermo </text:p>
            </text:list-item>
            <text:list-item>
              <text:p text:style-name="P36">Recoleta </text:p>
            </text:list-item>
            <text:list-item>
              <text:p text:style-name="P37">Eventos </text:p>
            </text:list-item>
          </text:list>
        </text:list-item>
      </text:list>
      <text:p text:style-name="Text_20_body">👉 Acá empieza lo fuerte de la semana</text:p>
      <text:p text:style-name="Horizontal_20_Line"/>
      <text:h text:style-name="Heading_20_2" text:outline-level="2">🔴 Viernes (DÍA CLAVE)</text:h>
      <text:p text:style-name="Text_20_body">🕗 07:00 – 10:00 (opcional, si no estás cansado)</text:p>
      <text:p text:style-name="Text_20_body">🕔 18:00 – 22:00</text:p>
      <text:p text:style-name="Text_20_body">🌙🔥 23:00 – 04:00</text:p>
      <text:list text:style-name="L19">
        <text:list-item>
          <text:p text:style-name="P38">Máxima ganancia semanal </text:p>
        </text:list-item>
        <text:list-item>
          <text:p text:style-name="P39">Tarifa dinámica frecuente </text:p>
        </text:list-item>
      </text:list>
      <text:p text:style-name="Text_20_body">👉 Este día puede representar GRAN parte de tu ingreso semanal</text:p>
      <text:p text:style-name="Horizontal_20_Line"/>
      <text:h text:style-name="Heading_20_2" text:outline-level="2">🔴 Sábado (EL MEJOR DÍA)</text:h>
      <text:p text:style-name="Text_20_body">🕒 10:00 – 14:00</text:p>
      <text:list text:style-name="L20">
        <text:list-item>
          <text:p text:style-name="P40"><text:soft-page-break/>Movimientos sociales / shopping </text:p>
        </text:list-item>
      </text:list>
      <text:p text:style-name="Text_20_body">🕔 18:00 – 22:00</text:p>
      <text:p text:style-name="Text_20_body">🌙🔥 23:30 – 05:00</text:p>
      <text:list text:style-name="L21">
        <text:list-item>
          <text:p text:style-name="P41">El pico máximo de toda la semana </text:p>
        </text:list-item>
        <text:list-item>
          <text:p text:style-name="P41">Ideal: </text:p>
          <text:list>
            <text:list-item>
              <text:p text:style-name="P41">Palermo </text:p>
            </text:list-item>
            <text:list-item>
              <text:p text:style-name="P41">Costanera </text:p>
            </text:list-item>
            <text:list-item>
              <text:p text:style-name="P42">Zonas de boliches </text:p>
            </text:list-item>
          </text:list>
        </text:list-item>
      </text:list>
      <text:p text:style-name="Text_20_body">👉 Si solo querés ganar plata → este día es obligatorio</text:p>
      <text:p text:style-name="Horizontal_20_Line"/>
      <text:h text:style-name="Heading_20_2" text:outline-level="2">🟡 Domingo</text:h>
      <text:p text:style-name="Text_20_body">🕒 10:00 – 14:00</text:p>
      <text:list text:style-name="L22">
        <text:list-item>
          <text:p text:style-name="P43">Familia / salidas </text:p>
        </text:list-item>
      </text:list>
      <text:p text:style-name="Text_20_body">🕔 18:00 – 22:00</text:p>
      <text:list text:style-name="L23">
        <text:list-item>
          <text:p text:style-name="P44">Regreso a casas </text:p>
        </text:list-item>
      </text:list>
      <text:p text:style-name="Text_20_body">👉 Día más tranquilo, pero suma bien</text:p>
      <text:p text:style-name="Horizontal_20_Line"/>
      <text:h text:style-name="Heading_20_1" text:outline-level="1">📍 Zonas clave que tenés que usar</text:h>
      <text:p text:style-name="Text_20_body">Desde Ituzaingó:</text:p>
      <text:h text:style-name="Heading_20_3" text:outline-level="3">🎯 Objetivo SIEMPRE:</text:h>
      <text:list text:style-name="L24">
        <text:list-item>
          <text:p text:style-name="P45">Entrar a CABA con viaje pago </text:p>
        </text:list-item>
      </text:list>
      <text:h text:style-name="Heading_20_3" text:outline-level="3">🟢 Zonas calientes:</text:h>
      <text:list text:style-name="L25">
        <text:list-item>
          <text:p text:style-name="P46">Palermo (la mejor de noche) </text:p>
        </text:list-item>
        <text:list-item>
          <text:p text:style-name="P46">Recoleta </text:p>
        </text:list-item>
        <text:list-item>
          <text:p text:style-name="P46">Microcentro </text:p>
        </text:list-item>
        <text:list-item>
          <text:p text:style-name="P47">Belgrano </text:p>
        </text:list-item>
      </text:list>
      <text:h text:style-name="Heading_20_3" text:outline-level="3">✈️ Bonus:</text:h>
      <text:list text:style-name="L26">
        <text:list-item>
          <text:p text:style-name="P48">Aeroparque → viajes largos </text:p>
        </text:list-item>
        <text:list-item>
          <text:p text:style-name="P49">Ezeiza → MUY rentables si enganchás </text:p>
        </text:list-item>
      </text:list>
      <text:p text:style-name="Horizontal_20_Line"/>
      <text:h text:style-name="Heading_20_1" text:outline-level="1"><text:soft-page-break/>🧠 Estrategia diaria (muy importante)</text:h>
      <text:h text:style-name="Heading_20_2" text:outline-level="2">🔁 Regla de oro:</text:h>
      <text:p text:style-name="Text_20_body">👉 “Nunca vuelvas vacío”</text:p>
      <text:list text:style-name="L27">
        <text:list-item>
          <text:p text:style-name="P50">Si estás en Capital → aceptá viajes hacia zona oeste </text:p>
        </text:list-item>
        <text:list-item>
          <text:p text:style-name="P51">Si estás en zona oeste → buscá viajes hacia Capital </text:p>
        </text:list-item>
      </text:list>
      <text:p text:style-name="Horizontal_20_Line"/>
      <text:h text:style-name="Heading_20_2" text:outline-level="2">📲 Uso de apps</text:h>
      <text:list text:style-name="L28">
        <text:list-item>
          <text:p text:style-name="P52">Activá 2 o 3 apps al mismo tiempo: </text:p>
          <text:list>
            <text:list-item>
              <text:p text:style-name="P52">Uber (base) </text:p>
            </text:list-item>
            <text:list-item>
              <text:p text:style-name="P52">Cabify (mejor tarifa) </text:p>
            </text:list-item>
            <text:list-item>
              <text:p text:style-name="P53">DiDi (relleno) </text:p>
            </text:list-item>
          </text:list>
        </text:list-item>
      </text:list>
      <text:p text:style-name="Horizontal_20_Line"/>
      <text:h text:style-name="Heading_20_2" text:outline-level="2">⛽ Combustible</text:h>
      <text:list text:style-name="L29">
        <text:list-item>
          <text:p text:style-name="P54">Si podés → GNC = clave para ganar más </text:p>
        </text:list-item>
        <text:list-item>
          <text:p text:style-name="P55">Evitá viajes largos con tráfico pesado si estás a nafta </text:p>
        </text:list-item>
      </text:list>
      <text:p text:style-name="Horizontal_20_Line"/>
      <text:h text:style-name="Heading_20_1" text:outline-level="1">💰 Proyección realista</text:h>
      <text:p text:style-name="Text_20_body">Si cumplís esta rutina:</text:p>
      <text:list text:style-name="L30">
        <text:list-item>
          <text:p text:style-name="P56">Días fuertes: jueves, viernes, sábado </text:p>
        </text:list-item>
        <text:list-item>
          <text:p text:style-name="P57">Días suaves: lunes, martes </text:p>
        </text:list-item>
      </text:list>
      <text:p text:style-name="Text_20_body">👉 Resultado:</text:p>
      <text:list text:style-name="L31">
        <text:list-item>
          <text:p text:style-name="P58">Ingreso equilibrado </text:p>
        </text:list-item>
        <text:list-item>
          <text:p text:style-name="P58">Menos desgaste </text:p>
        </text:list-item>
        <text:list-item>
          <text:p text:style-name="P59">Mayor ganancia por hora </text:p>
        </text:list-item>
      </text:list>
      <text:p text:style-name="Horizontal_20_Line"/>
      <text:h text:style-name="Heading_20_1" text:outline-level="1">⚠️ Errores que tenés que evitar</text:h>
      <text:p text:style-name="Text_20_body">❌ Quedarte esperando viajes en Ituzaingó<text:line-break/>❌ Trabajar horarios muertos (ej: 11:00–16:00 en semana)<text:line-break/>❌ No moverte a zonas de demanda<text:line-break/>❌ Usar una sola app<text:line-break/>❌ Volver vacío</text:p>
      <text:p text:style-name="Horizontal_20_Line"/>
      <text:h text:style-name="Heading_20_1" text:outline-level="1"><text:soft-page-break/>🎯 Resumen corto (clave)</text:h>
      <text:list text:style-name="L32">
        <text:list-item>
          <text:p text:style-name="P60">Zona oeste = punto de partida, no de trabajo </text:p>
        </text:list-item>
        <text:list-item>
          <text:p text:style-name="P60">La plata está en CABA </text:p>
        </text:list-item>
        <text:list-item>
          <text:p text:style-name="P60">La noche (jueves a sábado) es donde más se gana </text:p>
        </text:list-item>
        <text:list-item>
          <text:p text:style-name="P61">La estrategia vale más que las horas </text:p>
        </text:list-item>
      </text:list>
      <text:p text:style-name="Horizontal_20_Line"/>
      <text:p text:style-name="Text_20_body">Si querés, en el próximo paso puedo armarte:<text:line-break/>👉 un cálculo estimado de ganancias semanales según horas reales<text:line-break/>👉 o un “modo principiante” para arrancar sin riesgos los primeros días</text:p>
      <text:p text:style-name="Text_20_body">cuales días de la semana son los que tienen más demandas?</text:p>
      <text:p text:style-name="Text_20_body">Te lo resumo claro y sin vueltas: <text:span text:style-name="Strong_20_Emphasis">la demanda no es pareja durante la semana</text:span>. Hay un patrón muy marcado.</text:p>
      <text:p text:style-name="Horizontal_20_Line"/>
      <text:h text:style-name="Heading_20_1" text:outline-level="1">📊 🔥 Días con MÁS demanda (ranking real)</text:h>
      <text:h text:style-name="Heading_20_2" text:outline-level="2">🥇 1. Sábado</text:h>
      <text:list text:style-name="L33">
        <text:list-item>
          <text:p text:style-name="P62">Es el día más fuerte de todos </text:p>
        </text:list-item>
        <text:list-item>
          <text:p text:style-name="P63">Movimiento todo el día + pico brutal de noche </text:p>
        </text:list-item>
      </text:list>
      <text:p text:style-name="Text_20_body">👉 Motivos:</text:p>
      <text:list text:style-name="L34">
        <text:list-item>
          <text:p text:style-name="P64">Salidas sociales </text:p>
        </text:list-item>
        <text:list-item>
          <text:p text:style-name="P64">Boliches </text:p>
        </text:list-item>
        <text:list-item>
          <text:p text:style-name="P65">Eventos </text:p>
        </text:list-item>
      </text:list>
      <text:p text:style-name="Text_20_body">✔ <text:span text:style-name="Strong_20_Emphasis">Conclusión:</text:span> el día donde más podés facturar</text:p>
      <text:p text:style-name="Horizontal_20_Line"/>
      <text:h text:style-name="Heading_20_2" text:outline-level="2">🥈 2. Viernes</text:h>
      <text:list text:style-name="L35">
        <text:list-item>
          <text:p text:style-name="P66">Muy fuerte desde la tarde </text:p>
        </text:list-item>
        <text:list-item>
          <text:p text:style-name="P67">Explota a la noche </text:p>
        </text:list-item>
      </text:list>
      <text:p text:style-name="Text_20_body">👉 Motivos:</text:p>
      <text:list text:style-name="L36">
        <text:list-item>
          <text:p text:style-name="P68">Fin de semana empieza </text:p>
        </text:list-item>
        <text:list-item>
          <text:p text:style-name="P69">Salidas, cenas, bares </text:p>
        </text:list-item>
      </text:list>
      <text:p text:style-name="Text_20_body">✔ <text:span text:style-name="Strong_20_Emphasis">Clave:</text:span> desde 18:00 ya empieza a rendir</text:p>
      <text:p text:style-name="Horizontal_20_Line"/>
      <text:h text:style-name="Heading_20_2" text:outline-level="2"><text:soft-page-break/>🥉 3. Jueves</text:h>
      <text:list text:style-name="L37">
        <text:list-item>
          <text:p text:style-name="P70">Subestimado, pero MUY bueno </text:p>
        </text:list-item>
      </text:list>
      <text:p text:style-name="Text_20_body">👉 Motivos:</text:p>
      <text:list text:style-name="L38">
        <text:list-item>
          <text:p text:style-name="P71">Previa del finde </text:p>
        </text:list-item>
        <text:list-item>
          <text:p text:style-name="P72">After office + salidas </text:p>
        </text:list-item>
      </text:list>
      <text:p text:style-name="Text_20_body">✔ Desde las 20:00 en adelante se pone interesante</text:p>
      <text:p text:style-name="Horizontal_20_Line"/>
      <text:h text:style-name="Heading_20_1" text:outline-level="1">🟡 Demanda MEDIA</text:h>
      <text:h text:style-name="Heading_20_2" text:outline-level="2">Miércoles</text:h>
      <text:list text:style-name="L39">
        <text:list-item>
          <text:p text:style-name="P73">Día “bisagra” </text:p>
        </text:list-item>
        <text:list-item>
          <text:p text:style-name="P74">Normal de día, leve subida de noche </text:p>
        </text:list-item>
      </text:list>
      <text:p text:style-name="Text_20_body">👉 Sirve para trabajar tranquilo y sumar</text:p>
      <text:p text:style-name="Horizontal_20_Line"/>
      <text:h text:style-name="Heading_20_2" text:outline-level="2">Domingo</text:h>
      <text:list text:style-name="L40">
        <text:list-item>
          <text:p text:style-name="P75">Dos picos claros: </text:p>
          <text:list>
            <text:list-item>
              <text:p text:style-name="P75">Mediodía (familias) </text:p>
            </text:list-item>
            <text:list-item>
              <text:p text:style-name="P76">Tarde-noche (regresos) </text:p>
            </text:list-item>
          </text:list>
        </text:list-item>
      </text:list>
      <text:p text:style-name="Text_20_body">✔ No es explosivo, pero constante</text:p>
      <text:p text:style-name="Horizontal_20_Line"/>
      <text:h text:style-name="Heading_20_1" text:outline-level="1">🔵 Demanda BAJA</text:h>
      <text:h text:style-name="Heading_20_2" text:outline-level="2">Lunes</text:h>
      <text:list text:style-name="L41">
        <text:list-item>
          <text:p text:style-name="P77">El peor día </text:p>
        </text:list-item>
        <text:list-item>
          <text:p text:style-name="P78">Poca gente saliendo </text:p>
        </text:list-item>
      </text:list>
      <text:p text:style-name="Text_20_body">✔ Solo conviene horas pico laborales</text:p>
      <text:p text:style-name="Horizontal_20_Line"/>
      <text:h text:style-name="Heading_20_2" text:outline-level="2">Martes</text:h>
      <text:list text:style-name="L42">
        <text:list-item>
          <text:p text:style-name="P79">Similar al lunes, un poco mejor </text:p>
        </text:list-item>
      </text:list>
      <text:p text:style-name="Text_20_body">✔ Sirve para completar ingresos, no para hacer diferencia</text:p>
      <text:p text:style-name="Horizontal_20_Line"/>
      <text:h text:style-name="Heading_20_1" text:outline-level="1"><text:soft-page-break/>📈 Resumen simple (muy útil)</text:h>
      <text:p text:style-name="Text_20_body">🔥 Alta demanda:</text:p>
      <text:list text:style-name="L43">
        <text:list-item>
          <text:p text:style-name="P80">Jueves (noche) </text:p>
        </text:list-item>
        <text:list-item>
          <text:p text:style-name="P80">Viernes (tarde/noche) </text:p>
        </text:list-item>
        <text:list-item>
          <text:p text:style-name="P81">Sábado (todo el día + noche) </text:p>
        </text:list-item>
      </text:list>
      <text:p text:style-name="Text_20_body">⚖️ Media:</text:p>
      <text:list text:style-name="L44">
        <text:list-item>
          <text:p text:style-name="P82">Miércoles </text:p>
        </text:list-item>
        <text:list-item>
          <text:p text:style-name="P83">Domingo </text:p>
        </text:list-item>
      </text:list>
      <text:p text:style-name="Text_20_body">❄️ Baja:</text:p>
      <text:list text:style-name="L45">
        <text:list-item>
          <text:p text:style-name="P84">Lunes </text:p>
        </text:list-item>
        <text:list-item>
          <text:p text:style-name="P85">Martes </text:p>
        </text:list-item>
      </text:list>
      <text:p text:style-name="Horizontal_20_Line"/>
      <text:h text:style-name="Heading_20_1" text:outline-level="1">🎯 Clave que hace la diferencia</text:h>
      <text:p text:style-name="Text_20_body">👉 No es solo el día, es el horario:</text:p>
      <text:list text:style-name="L46">
        <text:list-item>
          <text:p text:style-name="P86">Un lunes 08:00 → puede ser mejor que un sábado 14:00 </text:p>
        </text:list-item>
        <text:list-item>
          <text:p text:style-name="P87">Un sábado 02:00 → es el mejor momento de toda la semana </text:p>
        </text:list-item>
      </text:list>
      <text:p text:style-name="Horizontal_20_Line"/>
      <text:h text:style-name="Heading_20_1" text:outline-level="1">💡 Estrategia ganadora</text:h>
      <text:p text:style-name="Text_20_body">Si querés maximizar ingresos:</text:p>
      <text:list text:style-name="L47">
        <text:list-item>
          <text:p text:style-name="P88">Meté fuerte: </text:p>
          <text:list>
            <text:list-item>
              <text:p text:style-name="P88">Jueves noche </text:p>
            </text:list-item>
            <text:list-item>
              <text:p text:style-name="P88">Viernes noche </text:p>
            </text:list-item>
            <text:list-item>
              <text:p text:style-name="P88">Sábado completo </text:p>
            </text:list-item>
          </text:list>
        </text:list-item>
        <text:list-item>
          <text:p text:style-name="P88">Usá lunes y martes solo para: </text:p>
          <text:list>
            <text:list-item>
              <text:p text:style-name="P88">Horas pico </text:p>
            </text:list-item>
            <text:list-item>
              <text:p text:style-name="P89">Mantener flujo de ingresos </text:p>
            </text:list-item>
          </text:list>
        </text:list-item>
      </text:list>
      <text:p text:style-name="Horizontal_20_Line"/>
      <text:p text:style-name="Text_20_body">Si querés, puedo cruzarte esto con <text:span text:style-name="Strong_20_Emphasis">zonas específicas de CABA (mapa mental de dónde pararte a cada hora)</text:span>, que es lo que realmente separa a un chofer promedio de uno que gana bie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5:44:06.784350522</meta:creation-date>
    <dc:date>2026-04-15T15:44:24.368715632</dc:date>
    <meta:editing-duration>PT18S</meta:editing-duration>
    <meta:editing-cycles>1</meta:editing-cycles>
    <meta:document-statistic meta:table-count="0" meta:image-count="0" meta:object-count="0" meta:page-count="10" meta:paragraph-count="247" meta:word-count="1606" meta:character-count="8439" meta:non-whitespace-character-count="7060"/>
    <meta:generator>LibreOffice/26.2.2.2$Linux_X86_64 LibreOffice_project/1f77d10d6938fd34972958f64b2bcfa54f8b1ba5</meta:generator>
  </office:meta>
</office:document-meta>
</file>