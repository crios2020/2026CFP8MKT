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1.104cm" table:align="left"/>
    </style:style>
    <style:style style:name="Tabla1.A" style:family="table-column">
      <style:table-column-properties style:column-width="2.058cm"/>
    </style:style>
    <style:style style:name="Tabla1.B" style:family="table-column">
      <style:table-column-properties style:column-width="3.678cm"/>
    </style:style>
    <style:style style:name="Tabla1.C" style:family="table-column">
      <style:table-column-properties style:column-width="5.368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8.273cm" table:align="left"/>
    </style:style>
    <style:style style:name="Tabla2.A" style:family="table-column">
      <style:table-column-properties style:column-width="2.058cm"/>
    </style:style>
    <style:style style:name="Tabla2.B" style:family="table-column">
      <style:table-column-properties style:column-width="6.214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6.235cm" table:align="left"/>
    </style:style>
    <style:style style:name="Tabla3.A" style:family="table-column">
      <style:table-column-properties style:column-width="2.058cm"/>
    </style:style>
    <style:style style:name="Tabla3.B" style:family="table-column">
      <style:table-column-properties style:column-width="4.177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9.922cm" table:align="left"/>
    </style:style>
    <style:style style:name="Tabla4.A" style:family="table-column">
      <style:table-column-properties style:column-width="2.656cm"/>
    </style:style>
    <style:style style:name="Tabla4.B" style:family="table-column">
      <style:table-column-properties style:column-width="1.926cm"/>
    </style:style>
    <style:style style:name="Tabla4.C" style:family="table-column">
      <style:table-column-properties style:column-width="2.067cm"/>
    </style:style>
    <style:style style:name="Tabla4.D" style:family="table-column">
      <style:table-column-properties style:column-width="1.596cm"/>
    </style:style>
    <style:style style:name="Tabla4.E" style:family="table-column">
      <style:table-column-properties style:column-width="1.676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7.639cm" table:align="left"/>
    </style:style>
    <style:style style:name="Tabla5.A" style:family="table-column">
      <style:table-column-properties style:column-width="3.858cm"/>
    </style:style>
    <style:style style:name="Tabla5.B" style:family="table-column">
      <style:table-column-properties style:column-width="3.782cm"/>
    </style:style>
    <style:style style:name="Tabla5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>
      <style:paragraph-properties fo:margin-top="0cm" fo:margin-bottom="0cm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3">
      <style:paragraph-properties fo:margin-top="0cm" fo:margin-bottom="0cm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>
      <style:paragraph-properties fo:margin-top="0cm" fo:margin-bottom="0cm" style:contextual-spacing="false"/>
    </style:style>
    <style:style style:name="P27" style:family="paragraph" style:parent-style-name="Text_20_body" style:list-style-name="L15"/>
    <style:style style:name="P28" style:family="paragraph" style:parent-style-name="Text_20_body" style:list-style-name="L16">
      <style:paragraph-properties fo:margin-top="0cm" fo:margin-bottom="0cm" style:contextual-spacing="false"/>
    </style:style>
    <style:style style:name="P29" style:family="paragraph" style:parent-style-name="Text_20_body" style:list-style-name="L16"/>
    <style:style style:name="P30" style:family="paragraph" style:parent-style-name="Text_20_body" style:list-style-name="L17"/>
    <style:style style:name="P31" style:family="paragraph" style:parent-style-name="Text_20_body" style:list-style-name="L18"/>
    <style:style style:name="P32" style:family="paragraph" style:parent-style-name="Text_20_body" style:list-style-name="L19"/>
    <style:style style:name="P33" style:family="paragraph" style:parent-style-name="Text_20_body" style:list-style-name="L20">
      <style:paragraph-properties fo:margin-top="0cm" fo:margin-bottom="0cm" style:contextual-spacing="false"/>
    </style:style>
    <style:style style:name="P34" style:family="paragraph" style:parent-style-name="Text_20_body" style:list-style-name="L20"/>
    <style:style style:name="P35" style:family="paragraph" style:parent-style-name="Text_20_body" style:list-style-name="L21"/>
    <style:style style:name="P36" style:family="paragraph" style:parent-style-name="Text_20_body" style:list-style-name="L22"/>
    <style:style style:name="P37" style:family="paragraph" style:parent-style-name="Text_20_body" style:list-style-name="L23">
      <style:paragraph-properties fo:margin-top="0cm" fo:margin-bottom="0cm" style:contextual-spacing="false"/>
    </style:style>
    <style:style style:name="P38" style:family="paragraph" style:parent-style-name="Text_20_body" style:list-style-name="L23"/>
    <style:style style:name="P39" style:family="paragraph" style:parent-style-name="Text_20_body" style:list-style-name="L24">
      <style:paragraph-properties fo:margin-top="0cm" fo:margin-bottom="0cm" style:contextual-spacing="false"/>
    </style:style>
    <style:style style:name="P40" style:family="paragraph" style:parent-style-name="Text_20_body" style:list-style-name="L24"/>
    <style:style style:name="P41" style:family="paragraph" style:parent-style-name="Text_20_body" style:list-style-name="L25">
      <style:paragraph-properties fo:margin-top="0cm" fo:margin-bottom="0cm" style:contextual-spacing="false"/>
    </style:style>
    <style:style style:name="P42" style:family="paragraph" style:parent-style-name="Text_20_body" style:list-style-name="L25"/>
    <style:style style:name="P43" style:family="paragraph" style:parent-style-name="Text_20_body" style:list-style-name="L26">
      <style:paragraph-properties fo:margin-top="0cm" fo:margin-bottom="0cm" style:contextual-spacing="false"/>
    </style:style>
    <style:style style:name="P44" style:family="paragraph" style:parent-style-name="Text_20_body" style:list-style-name="L26"/>
    <style:style style:name="P45" style:family="paragraph" style:parent-style-name="Text_20_body" style:list-style-name="L27">
      <style:paragraph-properties fo:margin-top="0cm" fo:margin-bottom="0cm" style:contextual-spacing="false"/>
    </style:style>
    <style:style style:name="P46" style:family="paragraph" style:parent-style-name="Text_20_body" style:list-style-name="L2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e paso un informe resumido y bastante realista usando datos de publicidad activa (“ad reach”) de plataformas como Meta, TikTok y X. Es la métrica más utilizada actualmente para estimar usuarios activos reales por país.</text:p>
      <text:h text:style-name="Heading_20_2" text:outline-level="2">Argentina (2025–2026)</text:h>
      <text:p text:style-name="Text_20_body">Según <text:a xlink:type="simple" xlink:href="https://datareportal.com/reports/digital-2025-argentina/?rq=digital+2024+argentina&amp;utm_source=chatgpt.com" office:target-frame-name="_blank" xlink:show="new" text:style-name="Internet_20_link" text:visited-style-name="Visited_20_Internet_20_Link">DataReportal Argentina 2025</text:a> y <text:a xlink:type="simple" xlink:href="https://datareportal.com/reports/digital-2026-argentina/?rq=Argentina+2026&amp;utm_source=chatgpt.com" office:target-frame-name="_blank" xlink:show="new" text:style-name="Internet_20_link" text:visited-style-name="Visited_20_Internet_20_Link">DataReportal Argentina 2026</text:a>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Red social</text:p>
            </table:table-cell>
            <table:table-cell table:style-name="Tabla1.A1" office:value-type="string">
              <text:p text:style-name="Table_20_Heading">Usuarios estimados</text:p>
            </table:table-cell>
            <table:table-cell table:style-name="Tabla1.A1" office:value-type="string">
              <text:p text:style-name="Table_20_Heading">% de la población argentina</text:p>
            </table:table-cell>
          </table:table-row>
        </table:table-header-rows>
        <table:table-row>
          <table:table-cell table:style-name="Tabla1.A1" office:value-type="string">
            <text:p text:style-name="Table_20_Contents">Facebook</text:p>
          </table:table-cell>
          <table:table-cell table:style-name="Tabla1.A1" office:value-type="string">
            <text:p text:style-name="Table_20_Contents">~29–29.3 millones</text:p>
          </table:table-cell>
          <table:table-cell table:style-name="Tabla1.A1" office:value-type="string">
            <text:p text:style-name="Table_20_Contents">~63–64%</text:p>
          </table:table-cell>
        </table:table-row>
        <table:table-row>
          <table:table-cell table:style-name="Tabla1.A1" office:value-type="string">
            <text:p text:style-name="Table_20_Contents">Instagram</text:p>
          </table:table-cell>
          <table:table-cell table:style-name="Tabla1.A1" office:value-type="string">
            <text:p text:style-name="Table_20_Contents">~29–31 millones</text:p>
          </table:table-cell>
          <table:table-cell table:style-name="Tabla1.A1" office:value-type="string">
            <text:p text:style-name="Table_20_Contents">~63–68%</text:p>
          </table:table-cell>
        </table:table-row>
        <table:table-row>
          <table:table-cell table:style-name="Tabla1.A1" office:value-type="string">
            <text:p text:style-name="Table_20_Contents">TikTok</text:p>
          </table:table-cell>
          <table:table-cell table:style-name="Tabla1.A1" office:value-type="string">
            <text:p text:style-name="Table_20_Contents">~24–27 millones</text:p>
          </table:table-cell>
          <table:table-cell table:style-name="Tabla1.A1" office:value-type="string">
            <text:p text:style-name="Table_20_Contents">~53–59%</text:p>
          </table:table-cell>
        </table:table-row>
        <table:table-row>
          <table:table-cell table:style-name="Tabla1.A1" office:value-type="string">
            <text:p text:style-name="Table_20_Contents">X</text:p>
          </table:table-cell>
          <table:table-cell table:style-name="Tabla1.A1" office:value-type="string">
            <text:p text:style-name="Table_20_Contents">~6.7–7.3 millones</text:p>
          </table:table-cell>
          <table:table-cell table:style-name="Tabla1.A1" office:value-type="string">
            <text:p text:style-name="Table_20_Contents">~15–16%</text:p>
          </table:table-cell>
        </table:table-row>
      </table:table>
      <text:h text:style-name="Heading_20_3" text:outline-level="3">Conclusiones para Argentina</text:h>
      <text:list text:style-name="L1">
        <text:list-item>
          <text:p text:style-name="P1">Instagram y Facebook tienen prácticamente la misma penetración nacional. </text:p>
        </text:list-item>
        <text:list-item>
          <text:p text:style-name="P1">TikTok crece más rápido entre menores de 35 años. </text:p>
        </text:list-item>
        <text:list-item>
          <text:p text:style-name="P1">X/Twitter tiene mucha influencia política y mediática, pero una base de usuarios mucho menor. </text:p>
        </text:list-item>
        <text:list-item>
          <text:p text:style-name="P2">Aproximadamente el 70% de los argentinos usa al menos una red social activamente. </text:p>
        </text:list-item>
      </text:list>
      <text:p text:style-name="Horizontal_20_Line"/>
      <text:h text:style-name="Heading_20_1" text:outline-level="1">Región AMBA (CABA + GBA)</text:h>
      <text:p text:style-name="Text_20_body">No existen estadísticas oficiales exactas exclusivas de AMBA para cada plataforma, pero sí se puede estimar porque:</text:p>
      <text:list text:style-name="L2">
        <text:list-item>
          <text:p text:style-name="P3">AMBA concentra entre 35% y 38% de la población argentina. </text:p>
        </text:list-item>
        <text:list-item>
          <text:p text:style-name="P4">Tiene mayor conectividad, urbanización y uso digital que el promedio nacional. </text:p>
        </text:list-item>
      </text:list>
      <text:p text:style-name="Text_20_body">Por eso, en AMBA las tasas suelen ser más altas que la media argentina.</text:p>
      <text:h text:style-name="Heading_20_2" text:outline-level="2">Estimación AMBA 2025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Red social</text:p>
            </table:table-cell>
            <table:table-cell table:style-name="Tabla2.A1" office:value-type="string">
              <text:p text:style-name="Table_20_Heading">% estimado de población AMBA</text:p>
            </table:table-cell>
          </table:table-row>
        </table:table-header-rows>
        <table:table-row>
          <table:table-cell table:style-name="Tabla2.A1" office:value-type="string">
            <text:p text:style-name="Table_20_Contents">Facebook</text:p>
          </table:table-cell>
          <table:table-cell table:style-name="Tabla2.A1" office:value-type="string">
            <text:p text:style-name="Table_20_Contents">70–75%</text:p>
          </table:table-cell>
        </table:table-row>
        <table:table-row>
          <table:table-cell table:style-name="Tabla2.A1" office:value-type="string">
            <text:p text:style-name="Table_20_Contents">Instagram</text:p>
          </table:table-cell>
          <table:table-cell table:style-name="Tabla2.A1" office:value-type="string">
            <text:p text:style-name="Table_20_Contents">72–78%</text:p>
          </table:table-cell>
        </table:table-row>
        <table:table-row>
          <table:table-cell table:style-name="Tabla2.A1" office:value-type="string">
            <text:p text:style-name="Table_20_Contents">TikTok</text:p>
          </table:table-cell>
          <table:table-cell table:style-name="Tabla2.A1" office:value-type="string">
            <text:p text:style-name="Table_20_Contents">60–68%</text:p>
          </table:table-cell>
        </table:table-row>
        <table:table-row>
          <table:table-cell table:style-name="Tabla2.A1" office:value-type="string">
            <text:p text:style-name="Table_20_Contents">X</text:p>
          </table:table-cell>
          <table:table-cell table:style-name="Tabla2.A1" office:value-type="string">
            <text:p text:style-name="Table_20_Contents">20–25%</text:p>
          </table:table-cell>
        </table:table-row>
      </table:table>
      <text:h text:style-name="Heading_20_3" text:outline-level="3">Particularidades del AMBA</text:h>
      <text:list text:style-name="L3">
        <text:list-item>
          <text:p text:style-name="P5">Instagram domina claramente en CABA y corredores urbanos jóvenes. </text:p>
        </text:list-item>
        <text:list-item>
          <text:p text:style-name="P5">TikTok tiene muchísima penetración en menores de 30. </text:p>
        </text:list-item>
        <text:list-item>
          <text:p text:style-name="P5">Facebook sigue siendo extremadamente fuerte para: </text:p>
          <text:list>
            <text:list-item>
              <text:p text:style-name="P5">Marketplace </text:p>
            </text:list-item>
            <text:list-item>
              <text:p text:style-name="P5">grupos barriales </text:p>
            </text:list-item>
            <text:list-item>
              <text:p text:style-name="P5">comercios </text:p>
            </text:list-item>
            <text:list-item>
              <text:p text:style-name="P5"><text:soft-page-break/>adultos +35 </text:p>
            </text:list-item>
          </text:list>
        </text:list-item>
        <text:list-item>
          <text:p text:style-name="P5">X tiene más peso relativo en AMBA porque concentra: </text:p>
          <text:list>
            <text:list-item>
              <text:p text:style-name="P5">periodistas </text:p>
            </text:list-item>
            <text:list-item>
              <text:p text:style-name="P5">política </text:p>
            </text:list-item>
            <text:list-item>
              <text:p text:style-name="P5">tecnología </text:p>
            </text:list-item>
            <text:list-item>
              <text:p text:style-name="P5">finanzas </text:p>
            </text:list-item>
            <text:list-item>
              <text:p text:style-name="P6">gaming </text:p>
            </text:list-item>
          </text:list>
        </text:list-item>
      </text:list>
      <text:p text:style-name="Horizontal_20_Line"/>
      <text:h text:style-name="Heading_20_1" text:outline-level="1">Latinoamérica (promedio regional aproximado)</text:h>
      <text:p text:style-name="Text_20_body">Los números cambian mucho según el país (Brasil, México y Argentina tienen comportamientos distintos), pero el promedio regional queda aproximadamente así:</text:p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Table_20_Heading">Red social</text:p>
            </table:table-cell>
            <table:table-cell table:style-name="Tabla3.A1" office:value-type="string">
              <text:p text:style-name="Table_20_Heading">% población LATAM</text:p>
            </table:table-cell>
          </table:table-row>
        </table:table-header-rows>
        <table:table-row>
          <table:table-cell table:style-name="Tabla3.A1" office:value-type="string">
            <text:p text:style-name="Table_20_Contents">Facebook</text:p>
          </table:table-cell>
          <table:table-cell table:style-name="Tabla3.A1" office:value-type="string">
            <text:p text:style-name="Table_20_Contents">65–72%</text:p>
          </table:table-cell>
        </table:table-row>
        <table:table-row>
          <table:table-cell table:style-name="Tabla3.A1" office:value-type="string">
            <text:p text:style-name="Table_20_Contents">Instagram</text:p>
          </table:table-cell>
          <table:table-cell table:style-name="Tabla3.A1" office:value-type="string">
            <text:p text:style-name="Table_20_Contents">55–65%</text:p>
          </table:table-cell>
        </table:table-row>
        <table:table-row>
          <table:table-cell table:style-name="Tabla3.A1" office:value-type="string">
            <text:p text:style-name="Table_20_Contents">TikTok</text:p>
          </table:table-cell>
          <table:table-cell table:style-name="Tabla3.A1" office:value-type="string">
            <text:p text:style-name="Table_20_Contents">45–60%</text:p>
          </table:table-cell>
        </table:table-row>
        <table:table-row>
          <table:table-cell table:style-name="Tabla3.A1" office:value-type="string">
            <text:p text:style-name="Table_20_Contents">X</text:p>
          </table:table-cell>
          <table:table-cell table:style-name="Tabla3.A1" office:value-type="string">
            <text:p text:style-name="Table_20_Contents">12–20%</text:p>
          </table:table-cell>
        </table:table-row>
      </table:table>
      <text:h text:style-name="Heading_20_2" text:outline-level="2">Tendencias regionales</text:h>
      <text:h text:style-name="Heading_20_3" text:outline-level="3">Facebook</text:h>
      <text:list text:style-name="L4">
        <text:list-item>
          <text:p text:style-name="P7">Sigue siendo la red más masiva. </text:p>
        </text:list-item>
        <text:list-item>
          <text:p text:style-name="P7">Muy fuerte en: </text:p>
          <text:list>
            <text:list-item>
              <text:p text:style-name="P7">México </text:p>
            </text:list-item>
            <text:list-item>
              <text:p text:style-name="P7">Perú </text:p>
            </text:list-item>
            <text:list-item>
              <text:p text:style-name="P7">Bolivia </text:p>
            </text:list-item>
            <text:list-item>
              <text:p text:style-name="P7">Paraguay </text:p>
            </text:list-item>
            <text:list-item>
              <text:p text:style-name="P8">Centroamérica </text:p>
            </text:list-item>
          </text:list>
        </text:list-item>
      </text:list>
      <text:h text:style-name="Heading_20_3" text:outline-level="3">Instagram</text:h>
      <text:list text:style-name="L5">
        <text:list-item>
          <text:p text:style-name="P9">Crece más en: </text:p>
          <text:list>
            <text:list-item>
              <text:p text:style-name="P9">Argentina </text:p>
            </text:list-item>
            <text:list-item>
              <text:p text:style-name="P9">Chile </text:p>
            </text:list-item>
            <text:list-item>
              <text:p text:style-name="P9">Uruguay </text:p>
            </text:list-item>
            <text:list-item>
              <text:p text:style-name="P9">Brasil </text:p>
            </text:list-item>
          </text:list>
        </text:list-item>
        <text:list-item>
          <text:p text:style-name="P9">Mucho más usada por: </text:p>
          <text:list>
            <text:list-item>
              <text:p text:style-name="P9">marcas </text:p>
            </text:list-item>
            <text:list-item>
              <text:p text:style-name="P9">profesionales </text:p>
            </text:list-item>
            <text:list-item>
              <text:p text:style-name="P9">ecommerce </text:p>
            </text:list-item>
            <text:list-item>
              <text:p text:style-name="P10">influencers </text:p>
            </text:list-item>
          </text:list>
        </text:list-item>
      </text:list>
      <text:h text:style-name="Heading_20_3" text:outline-level="3"><text:soft-page-break/>TikTok</text:h>
      <text:list text:style-name="L6">
        <text:list-item>
          <text:p text:style-name="P11">Es la plataforma con mayor crecimiento. </text:p>
        </text:list-item>
        <text:list-item>
          <text:p text:style-name="P11">Dominante entre menores de 25–30 años. </text:p>
        </text:list-item>
        <text:list-item>
          <text:p text:style-name="P12">Muy fuerte en contenido viral y descubrimiento. </text:p>
        </text:list-item>
      </text:list>
      <text:h text:style-name="Heading_20_3" text:outline-level="3">X</text:h>
      <text:list text:style-name="L7">
        <text:list-item>
          <text:p text:style-name="P13">Tiene menos usuarios pero gran impacto mediático. </text:p>
        </text:list-item>
        <text:list-item>
          <text:p text:style-name="P13">Fuerte en: </text:p>
          <text:list>
            <text:list-item>
              <text:p text:style-name="P13">política </text:p>
            </text:list-item>
            <text:list-item>
              <text:p text:style-name="P13">noticias </text:p>
            </text:list-item>
            <text:list-item>
              <text:p text:style-name="P13">deportes </text:p>
            </text:list-item>
            <text:list-item>
              <text:p text:style-name="P13">tecnología </text:p>
            </text:list-item>
            <text:list-item>
              <text:p text:style-name="P14">criptomonedas </text:p>
            </text:list-item>
          </text:list>
        </text:list-item>
      </text:list>
      <text:p text:style-name="Horizontal_20_Line"/>
      <text:h text:style-name="Heading_20_1" text:outline-level="1">Resumen rápido</text:h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header-rows>
          <table:table-row>
            <table:table-cell table:style-name="Tabla4.A1" office:value-type="string">
              <text:p text:style-name="Table_20_Heading">Región</text:p>
            </table:table-cell>
            <table:table-cell table:style-name="Tabla4.A1" office:value-type="string">
              <text:p text:style-name="Table_20_Heading">Facebook</text:p>
            </table:table-cell>
            <table:table-cell table:style-name="Tabla4.A1" office:value-type="string">
              <text:p text:style-name="Table_20_Heading">Instagram</text:p>
            </table:table-cell>
            <table:table-cell table:style-name="Tabla4.A1" office:value-type="string">
              <text:p text:style-name="Table_20_Heading">TikTok</text:p>
            </table:table-cell>
            <table:table-cell table:style-name="Tabla4.A1" office:value-type="string">
              <text:p text:style-name="Table_20_Heading">X</text:p>
            </table:table-cell>
          </table:table-row>
        </table:table-header-rows>
        <table:table-row>
          <table:table-cell table:style-name="Tabla4.A1" office:value-type="string">
            <text:p text:style-name="Table_20_Contents">Argentina</text:p>
          </table:table-cell>
          <table:table-cell table:style-name="Tabla4.A1" office:value-type="string">
            <text:p text:style-name="Table_20_Contents">63–64%</text:p>
          </table:table-cell>
          <table:table-cell table:style-name="Tabla4.A1" office:value-type="string">
            <text:p text:style-name="Table_20_Contents">63–68%</text:p>
          </table:table-cell>
          <table:table-cell table:style-name="Tabla4.A1" office:value-type="string">
            <text:p text:style-name="Table_20_Contents">53–59%</text:p>
          </table:table-cell>
          <table:table-cell table:style-name="Tabla4.A1" office:value-type="string">
            <text:p text:style-name="Table_20_Contents">15–16%</text:p>
          </table:table-cell>
        </table:table-row>
        <table:table-row>
          <table:table-cell table:style-name="Tabla4.A1" office:value-type="string">
            <text:p text:style-name="Table_20_Contents">AMBA</text:p>
          </table:table-cell>
          <table:table-cell table:style-name="Tabla4.A1" office:value-type="string">
            <text:p text:style-name="Table_20_Contents">70–75%</text:p>
          </table:table-cell>
          <table:table-cell table:style-name="Tabla4.A1" office:value-type="string">
            <text:p text:style-name="Table_20_Contents">72–78%</text:p>
          </table:table-cell>
          <table:table-cell table:style-name="Tabla4.A1" office:value-type="string">
            <text:p text:style-name="Table_20_Contents">60–68%</text:p>
          </table:table-cell>
          <table:table-cell table:style-name="Tabla4.A1" office:value-type="string">
            <text:p text:style-name="Table_20_Contents">20–25%</text:p>
          </table:table-cell>
        </table:table-row>
        <table:table-row>
          <table:table-cell table:style-name="Tabla4.A1" office:value-type="string">
            <text:p text:style-name="Table_20_Contents">Latinoamérica</text:p>
          </table:table-cell>
          <table:table-cell table:style-name="Tabla4.A1" office:value-type="string">
            <text:p text:style-name="Table_20_Contents">65–72%</text:p>
          </table:table-cell>
          <table:table-cell table:style-name="Tabla4.A1" office:value-type="string">
            <text:p text:style-name="Table_20_Contents">55–65%</text:p>
          </table:table-cell>
          <table:table-cell table:style-name="Tabla4.A1" office:value-type="string">
            <text:p text:style-name="Table_20_Contents">45–60%</text:p>
          </table:table-cell>
          <table:table-cell table:style-name="Tabla4.A1" office:value-type="string">
            <text:p text:style-name="Table_20_Contents">12–20%</text:p>
          </table:table-cell>
        </table:table-row>
      </table:table>
      <text:p text:style-name="Text_20_body">Fuentes principales:</text:p>
      <text:list text:style-name="L8">
        <text:list-item>
          <text:p text:style-name="P15"><text:a xlink:type="simple" xlink:href="https://datareportal.com/?utm_source=chatgpt.com" office:target-frame-name="_blank" xlink:show="new" text:style-name="Internet_20_link" text:visited-style-name="Visited_20_Internet_20_Link">DataReportal</text:a> </text:p>
        </text:list-item>
        <text:list-item>
          <text:p text:style-name="P16"><text:a xlink:type="simple" xlink:href="https://stats.napoleoncat.com/social-media-users-in-argentina/2025/?utm_source=chatgpt.com" office:target-frame-name="_blank" xlink:show="new" text:style-name="Internet_20_link" text:visited-style-name="Visited_20_Internet_20_Link">NapoleonCat Stats</text:a></text:p>
        </text:list-item>
      </text:list>
      <text:p text:style-name="Standard"/>
      <text:p text:style-name="Standard"/>
      <text:h text:style-name="Heading_20_2" text:outline-level="2">Desafíos virales más vistos y famosos de TikTok</text:h>
      <text:p text:style-name="Text_20_body">Muchos desafíos (“challenges”) alcanzaron miles de millones de visualizaciones globales. Algunos fueron bailes, otros humorísticos, deportivos o musicales.</text:p>
      <text:h text:style-name="Heading_20_1" text:outline-level="1">Los challenges más virales de la historia de TikTok</text:h>
      <text:h text:style-name="Heading_20_2" text:outline-level="2">1. #RenegadeChallenge</text:h>
      <text:p text:style-name="Text_20_body">Basado en una coreografía creada por:</text:p>
      <text:list text:style-name="L9">
        <text:list-item>
          <text:p text:style-name="P17">Jalaiah Harmon </text:p>
        </text:list-item>
      </text:list>
      <text:p text:style-name="Text_20_body">Fue uno de los primeros mega fenómenos globales de TikTok (2019–2020).</text:p>
      <text:h text:style-name="Heading_20_3" text:outline-level="3"><text:soft-page-break/>Impacto</text:h>
      <text:list text:style-name="L10">
        <text:list-item>
          <text:p text:style-name="P18">miles de millones de views </text:p>
        </text:list-item>
        <text:list-item>
          <text:p text:style-name="P18">millones de recreaciones </text:p>
        </text:list-item>
        <text:list-item>
          <text:p text:style-name="P19">ayudó a consolidar TikTok mundialmente </text:p>
        </text:list-item>
      </text:list>
      <text:p text:style-name="Horizontal_20_Line"/>
      <text:h text:style-name="Heading_20_2" text:outline-level="2">2. #SavageChallenge</text:h>
      <text:p text:style-name="Text_20_body">Asociado a la canción:</text:p>
      <text:list text:style-name="L11">
        <text:list-item>
          <text:p text:style-name="P20">Savage </text:p>
        </text:list-item>
      </text:list>
      <text:h text:style-name="Heading_20_3" text:outline-level="3">Características</text:h>
      <text:list text:style-name="L12">
        <text:list-item>
          <text:p text:style-name="P21">coreografía viral </text:p>
        </text:list-item>
        <text:list-item>
          <text:p text:style-name="P21">enorme presencia durante pandemia </text:p>
        </text:list-item>
        <text:list-item>
          <text:p text:style-name="P22">usado por celebridades y deportistas </text:p>
        </text:list-item>
      </text:list>
      <text:p text:style-name="Horizontal_20_Line"/>
      <text:h text:style-name="Heading_20_2" text:outline-level="2">3. #FlipTheSwitch</text:h>
      <text:p text:style-name="Text_20_body">Challenge donde dos personas cambian ropa o posiciones al apagarse la luz.</text:p>
      <text:h text:style-name="Heading_20_3" text:outline-level="3">Muy popular porque</text:h>
      <text:list text:style-name="L13">
        <text:list-item>
          <text:p text:style-name="P23">lo hicieron famosos </text:p>
        </text:list-item>
        <text:list-item>
          <text:p text:style-name="P23">políticos </text:p>
        </text:list-item>
        <text:list-item>
          <text:p text:style-name="P23">futbolistas </text:p>
        </text:list-item>
        <text:list-item>
          <text:p text:style-name="P24">celebridades </text:p>
        </text:list-item>
      </text:list>
      <text:p text:style-name="Text_20_body">Tuvo cientos de millones de reproducciones.</text:p>
      <text:p text:style-name="Horizontal_20_Line"/>
      <text:h text:style-name="Heading_20_2" text:outline-level="2">4. #WipeItDownChallenge</text:h>
      <text:p text:style-name="Text_20_body">Inspirado en la canción:</text:p>
      <text:list text:style-name="L14">
        <text:list-item>
          <text:p text:style-name="P25">Wipe It Down </text:p>
        </text:list-item>
      </text:list>
      <text:p text:style-name="Text_20_body">La persona limpiaba un espejo y aparecía transformada.</text:p>
      <text:p text:style-name="Text_20_body">Muy usado durante 2020.</text:p>
      <text:p text:style-name="Horizontal_20_Line"/>
      <text:h text:style-name="Heading_20_2" text:outline-level="2">5. #SilhouetteChallenge</text:h>
      <text:p text:style-name="Text_20_body">Uno de los más estéticos y virales.</text:p>
      <text:h text:style-name="Heading_20_3" text:outline-level="3"><text:soft-page-break/>Características</text:h>
      <text:list text:style-name="L15">
        <text:list-item>
          <text:p text:style-name="P26">iluminación roja </text:p>
        </text:list-item>
        <text:list-item>
          <text:p text:style-name="P26">siluetas </text:p>
        </text:list-item>
        <text:list-item>
          <text:p text:style-name="P27">transformación visual </text:p>
        </text:list-item>
      </text:list>
      <text:p text:style-name="Text_20_body">Se volvió gigantesco en:</text:p>
      <text:list text:style-name="L16">
        <text:list-item>
          <text:p text:style-name="P28">Instagram Reels </text:p>
        </text:list-item>
        <text:list-item>
          <text:p text:style-name="P28">TikTok </text:p>
        </text:list-item>
        <text:list-item>
          <text:p text:style-name="P29">YouTube Shorts </text:p>
        </text:list-item>
      </text:list>
      <text:p text:style-name="Horizontal_20_Line"/>
      <text:h text:style-name="Heading_20_2" text:outline-level="2">6. #BussItChallenge</text:h>
      <text:p text:style-name="Text_20_body">Basado en:</text:p>
      <text:list text:style-name="L17">
        <text:list-item>
          <text:p text:style-name="P30">Buss It </text:p>
        </text:list-item>
      </text:list>
      <text:p text:style-name="Text_20_body">Consistía en pasar de ropa casual a look glamoroso con una transición musical.</text:p>
      <text:p text:style-name="Horizontal_20_Line"/>
      <text:h text:style-name="Heading_20_2" text:outline-level="2">7. #WednesdayDance</text:h>
      <text:p text:style-name="Text_20_body">Explosión viral basada en la serie:</text:p>
      <text:list text:style-name="L18">
        <text:list-item>
          <text:p text:style-name="P31">Wednesday </text:p>
        </text:list-item>
      </text:list>
      <text:p text:style-name="Text_20_body">y la actuación de:</text:p>
      <text:list text:style-name="L19">
        <text:list-item>
          <text:p text:style-name="P32">Jenna Ortega </text:p>
        </text:list-item>
      </text:list>
      <text:h text:style-name="Heading_20_3" text:outline-level="3">Alcance</text:h>
      <text:list text:style-name="L20">
        <text:list-item>
          <text:p text:style-name="P33">miles de millones de reproducciones </text:p>
        </text:list-item>
        <text:list-item>
          <text:p text:style-name="P34">tendencia global en 2022–2023 </text:p>
        </text:list-item>
      </text:list>
      <text:p text:style-name="Horizontal_20_Line"/>
      <text:h text:style-name="Heading_20_2" text:outline-level="2">8. #IceBucketChallenge</text:h>
      <text:p text:style-name="Text_20_body">Aunque nació antes de TikTok (2014), volvió a viralizarse en la plataforma.</text:p>
      <text:p text:style-name="Text_20_body">Relacionado con campañas sobre:</text:p>
      <text:list text:style-name="L21">
        <text:list-item>
          <text:p text:style-name="P35">Esclerosis lateral amiotrófica (ELA/ALS) </text:p>
        </text:list-item>
      </text:list>
      <text:p text:style-name="Horizontal_20_Line"/>
      <text:h text:style-name="Heading_20_2" text:outline-level="2">9. #InMyFeelingsChallenge</text:h>
      <text:p text:style-name="Text_20_body">Basado en:</text:p>
      <text:list text:style-name="L22">
        <text:list-item>
          <text:p text:style-name="P36">In My Feelings </text:p>
        </text:list-item>
      </text:list>
      <text:p text:style-name="Text_20_body"><text:soft-page-break/>La gente bailaba bajándose del auto.</text:p>
      <text:p text:style-name="Text_20_body">Fue tan viral que generó advertencias de seguridad.</text:p>
      <text:p text:style-name="Horizontal_20_Line"/>
      <text:h text:style-name="Heading_20_2" text:outline-level="2">10. #BottleCapChallenge</text:h>
      <text:p text:style-name="Text_20_body">Popularizado por:</text:p>
      <text:list text:style-name="L23">
        <text:list-item>
          <text:p text:style-name="P37">Jason Statham </text:p>
        </text:list-item>
        <text:list-item>
          <text:p text:style-name="P38">artistas marciales y deportistas </text:p>
        </text:list-item>
      </text:list>
      <text:p text:style-name="Text_20_body">Consistía en destapar una botella con una patada giratoria.</text:p>
      <text:p text:style-name="Horizontal_20_Line"/>
      <text:h text:style-name="Heading_20_1" text:outline-level="1">Challenges más vistos por hashtags (aproximados)</text:h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Table_20_Heading">Challenge</text:p>
            </table:table-cell>
            <table:table-cell table:style-name="Tabla5.A1" office:value-type="string">
              <text:p text:style-name="Table_20_Heading">Views aproximadas</text:p>
            </table:table-cell>
          </table:table-row>
        </table:table-header-rows>
        <table:table-row>
          <table:table-cell table:style-name="Tabla5.A1" office:value-type="string">
            <text:p text:style-name="Table_20_Contents">#Renegade</text:p>
          </table:table-cell>
          <table:table-cell table:style-name="Tabla5.A1" office:value-type="string">
            <text:p text:style-name="Table_20_Contents">+30 mil millones</text:p>
          </table:table-cell>
        </table:table-row>
        <table:table-row>
          <table:table-cell table:style-name="Tabla5.A1" office:value-type="string">
            <text:p text:style-name="Table_20_Contents">#SavageChallenge</text:p>
          </table:table-cell>
          <table:table-cell table:style-name="Tabla5.A1" office:value-type="string">
            <text:p text:style-name="Table_20_Contents">+20 mil millones</text:p>
          </table:table-cell>
        </table:table-row>
        <table:table-row>
          <table:table-cell table:style-name="Tabla5.A1" office:value-type="string">
            <text:p text:style-name="Table_20_Contents">#FlipTheSwitch</text:p>
          </table:table-cell>
          <table:table-cell table:style-name="Tabla5.A1" office:value-type="string">
            <text:p text:style-name="Table_20_Contents">+10 mil millones</text:p>
          </table:table-cell>
        </table:table-row>
        <table:table-row>
          <table:table-cell table:style-name="Tabla5.A1" office:value-type="string">
            <text:p text:style-name="Table_20_Contents">#SilhouetteChallenge</text:p>
          </table:table-cell>
          <table:table-cell table:style-name="Tabla5.A1" office:value-type="string">
            <text:p text:style-name="Table_20_Contents">+8 mil millones</text:p>
          </table:table-cell>
        </table:table-row>
        <table:table-row>
          <table:table-cell table:style-name="Tabla5.A1" office:value-type="string">
            <text:p text:style-name="Table_20_Contents">#WednesdayDance</text:p>
          </table:table-cell>
          <table:table-cell table:style-name="Tabla5.A1" office:value-type="string">
            <text:p text:style-name="Table_20_Contents">+15 mil millones</text:p>
          </table:table-cell>
        </table:table-row>
        <table:table-row>
          <table:table-cell table:style-name="Tabla5.A1" office:value-type="string">
            <text:p text:style-name="Table_20_Contents">#BussItChallenge</text:p>
          </table:table-cell>
          <table:table-cell table:style-name="Tabla5.A1" office:value-type="string">
            <text:p text:style-name="Table_20_Contents">+7 mil millones</text:p>
          </table:table-cell>
        </table:table-row>
      </table:table>
      <text:p text:style-name="Horizontal_20_Line"/>
      <text:h text:style-name="Heading_20_1" text:outline-level="1">En Argentina, los más populares suelen ser:</text:h>
      <text:list text:style-name="L24">
        <text:list-item>
          <text:p text:style-name="P39">bailes virales </text:p>
        </text:list-item>
        <text:list-item>
          <text:p text:style-name="P39">challenges de humor </text:p>
        </text:list-item>
        <text:list-item>
          <text:p text:style-name="P39">imitaciones </text:p>
        </text:list-item>
        <text:list-item>
          <text:p text:style-name="P39">trends de fútbol </text:p>
        </text:list-item>
        <text:list-item>
          <text:p text:style-name="P39">clips de streamers </text:p>
        </text:list-item>
        <text:list-item>
          <text:p text:style-name="P40">audios de TV o política </text:p>
        </text:list-item>
      </text:list>
      <text:p text:style-name="Text_20_body">Muy ligados a:</text:p>
      <text:list text:style-name="L25">
        <text:list-item>
          <text:p text:style-name="P41">TikTok </text:p>
        </text:list-item>
        <text:list-item>
          <text:p text:style-name="P41">Instagram Reels </text:p>
        </text:list-item>
        <text:list-item>
          <text:p text:style-name="P42">streaming argentino (Luzu, OLGA, Blender, etc.) </text:p>
        </text:list-item>
      </text:list>
      <text:p text:style-name="Horizontal_20_Line"/>
      <text:h text:style-name="Heading_20_1" text:outline-level="1">Tendencia actual (2025–2026)</text:h>
      <text:p text:style-name="Text_20_body">Los “desafíos” tradicionales están siendo reemplazados por:</text:p>
      <text:list text:style-name="L26">
        <text:list-item>
          <text:p text:style-name="P43"><text:soft-page-break/>trends de audio </text:p>
        </text:list-item>
        <text:list-item>
          <text:p text:style-name="P43">filtros IA </text:p>
        </text:list-item>
        <text:list-item>
          <text:p text:style-name="P43">memes rápidos </text:p>
        </text:list-item>
        <text:list-item>
          <text:p text:style-name="P43">formatos remix </text:p>
        </text:list-item>
        <text:list-item>
          <text:p text:style-name="P43">videos ultra cortos </text:p>
        </text:list-item>
        <text:list-item>
          <text:p text:style-name="P44">contenido generado con IA </text:p>
        </text:list-item>
      </text:list>
      <text:p text:style-name="Text_20_body">Hoy los algoritmos priorizan más:</text:p>
      <text:list text:style-name="L27">
        <text:list-item>
          <text:p text:style-name="P45">retención </text:p>
        </text:list-item>
        <text:list-item>
          <text:p text:style-name="P45">comentarios </text:p>
        </text:list-item>
        <text:list-item>
          <text:p text:style-name="P45">reposts </text:p>
        </text:list-item>
        <text:list-item>
          <text:p text:style-name="P46">tiempo de visualización </text:p>
        </text:list-item>
      </text:list>
      <text:p text:style-name="Text_20_body">que el challenge clásico de baile de la era 2020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7T15:46:03.038901133</meta:creation-date>
    <dc:date>2026-05-27T16:44:04.704844065</dc:date>
    <meta:editing-duration>PT23M9S</meta:editing-duration>
    <meta:editing-cycles>2</meta:editing-cycles>
    <meta:generator>LibreOffice/26.2.2.2$Linux_X86_64 LibreOffice_project/1f77d10d6938fd34972958f64b2bcfa54f8b1ba5</meta:generator>
    <meta:document-statistic meta:table-count="5" meta:image-count="0" meta:object-count="0" meta:page-count="7" meta:paragraph-count="228" meta:word-count="885" meta:character-count="5369" meta:non-whitespace-character-count="4746"/>
  </office:meta>
</office:document-meta>
</file>