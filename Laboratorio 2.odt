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168" officeooo:paragraph-rsid="001bc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oratorio 2 – Buyer Persona</text:h>
      <text:p text:style-name="P1"/>
      <text:p text:style-name="P1"/>
      <text:p text:style-name="P1">1- Cargar 3 o 4 fotos personales (o persona X) en una IA (chatGPT) y pedir que defina nuestro Buyer Person personal. Presentar un documento de Buyer Person personal.</text:p>
      <text:p text:style-name="P1"/>
      <text:p text:style-name="P1">2- Tomar como plantilla el documento del punto 1 y modificar para armar 1 buyer person de la investigación de mercado del laboratorio 1. Presentar un documento de Buyer Person de la investigación de mercado.</text:p>
      <text:p text:style-name="P1"/>
      <text:p text:style-name="P1">3- Pedir a una IA (Google Gemini) 3 fotos del buyer person del punto 2 y adjuntar las fotos al documento del punto 2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7:44:25.592572812</meta:creation-date>
    <dc:date>2026-04-20T17:54:35.995400687</dc:date>
    <meta:editing-duration>PT10M11S</meta:editing-duration>
    <meta:editing-cycles>1</meta:editing-cycles>
    <meta:document-statistic meta:table-count="0" meta:image-count="0" meta:object-count="0" meta:page-count="1" meta:paragraph-count="4" meta:word-count="92" meta:character-count="518" meta:non-whitespace-character-count="429"/>
    <meta:generator>LibreOffice/26.2.2.2$Linux_X86_64 LibreOffice_project/1f77d10d6938fd34972958f64b2bcfa54f8b1ba5</meta:generator>
  </office:meta>
</office:document-meta>
</file>